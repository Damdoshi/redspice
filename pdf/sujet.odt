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8000000E9C5FF3DFFA399AECE.png" manifest:media-type="image/png"/>
  <manifest:file-entry manifest:full-path="Pictures/100000000000030100000256D3F87BE8B22DA1AD.png" manifest:media-type="image/png"/>
  <manifest:file-entry manifest:full-path="Pictures/10000201000000A0000000A0B46C84CF58B59A48.png" manifest:media-type="image/png"/>
  <manifest:file-entry manifest:full-path="Pictures/100002010000081C000001C3A531001A8546C411.png" manifest:media-type="image/png"/>
  <manifest:file-entry manifest:full-path="Pictures/1000020100001B240000190598DC440914355D9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Source Code Pro Black" svg:font-family="'Source Code Pro Black'" style:font-pitch="fixed"/>
    <style:font-face style:name="Source Code Pro Black1" svg:font-family="'Source Code Pro Black'" style:font-adornments="Light" style:font-pitch="fixed"/>
    <style:font-face style:name="FreeMono" svg:font-family="FreeMono" style:font-family-generic="modern" style:font-pitch="fixed"/>
    <style:font-face style:name="Futura" svg:font-family="Futura" style:font-pitch="variable"/>
    <style:font-face style:name="Futura Std" svg:font-family="'Futura Std'" style:font-pitch="variable"/>
    <style:font-face style:name="Futura Std Light2" svg:font-family="'Futura Std Light'" style:font-pitch="variable"/>
    <style:font-face style:name="Futura Std Light" svg:font-family="'Futura Std Light'" style:font-adornments="Light" style:font-pitch="variable"/>
    <style:font-face style:name="Liberation Serif1" svg:font-family="'Liberation Serif'" style:font-pitch="variable"/>
    <style:font-face style:name="Mephisto™" svg:font-family="Mephisto™" style:font-pitch="variable"/>
    <style:font-face style:name="Source Code Pro Black2" svg:font-family="'Source Code Pro Black'" style:font-adornments="Light" style:font-pitch="variable"/>
    <style:font-face style:name="FreeMono1" svg:font-family="FreeMono" style:font-family-generic="modern" style:font-pitch="variable"/>
    <style:font-face style:name="Liberation Serif" svg:font-family="'Liberation Serif'" style:font-family-generic="roman" style:font-pitch="variable"/>
    <style:font-face style:name="Futura Std Light1" svg:font-family="'Futura Std Light'" style:font-family-generic="swiss"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officeooo:paragraph-rsid="00161285"/>
    </style:style>
    <style:style style:name="P2" style:family="paragraph" style:parent-style-name="Standard">
      <style:paragraph-properties fo:text-align="end" style:justify-single-word="false"/>
      <style:text-properties fo:color="#000000" style:font-name="Futura Std Light1" fo:font-size="12pt" fo:font-style="normal" officeooo:rsid="00318772" officeooo:paragraph-rsid="00356139" style:font-size-asian="12pt" style:font-style-asian="normal" style:font-size-complex="12pt" style:font-style-complex="normal"/>
    </style:style>
    <style:style style:name="P3" style:family="paragraph" style:parent-style-name="Standard">
      <style:text-properties style:font-name="Futura Std Light1"/>
    </style:style>
    <style:style style:name="P4" style:family="paragraph" style:parent-style-name="Standard">
      <style:paragraph-properties fo:text-align="center" style:justify-single-word="false"/>
      <style:text-properties style:font-name="Futura Std Light1" fo:font-size="12pt" fo:font-style="normal" fo:font-weight="bold" officeooo:rsid="02ac4a09" officeooo:paragraph-rsid="001a5dd1"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Futura Std Light1" fo:font-size="12pt" fo:font-style="normal" fo:font-weight="bold" officeooo:rsid="00356139" officeooo:paragraph-rsid="01796b86"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Futura Std Light1" fo:font-size="12pt" fo:font-style="normal" officeooo:rsid="001c12f4" officeooo:paragraph-rsid="001c12f4"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Futura Std Light1" fo:font-size="12pt" fo:font-style="normal" officeooo:rsid="001c12f4" officeooo:paragraph-rsid="01841e8a"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Futura Std Light1" fo:font-size="12pt" fo:font-style="normal" officeooo:rsid="001c12f4" officeooo:paragraph-rsid="01796b86"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Futura Std Light1" fo:font-size="12pt" fo:font-style="normal" officeooo:rsid="001c12f4" officeooo:paragraph-rsid="01841e8a"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Futura Std Light1" fo:font-size="12pt" fo:font-style="normal" officeooo:rsid="001c12f4" officeooo:paragraph-rsid="01891767"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Futura Std Light1" fo:font-size="12pt" fo:font-style="normal" officeooo:rsid="001c12f4" officeooo:paragraph-rsid="01841e8a"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Futura Std Light1" fo:font-size="12pt" fo:font-style="normal" officeooo:rsid="0023ee9b" officeooo:paragraph-rsid="01841e8a" style:font-size-asian="12pt" style:font-style-asian="normal" style:font-size-complex="12pt" style:font-style-complex="normal"/>
    </style:style>
    <style:style style:name="P13" style:family="paragraph" style:parent-style-name="Standard">
      <style:paragraph-properties fo:text-align="center" style:justify-single-word="false"/>
      <style:text-properties style:font-name="Futura Std Light1" fo:font-size="12pt" fo:font-style="normal" officeooo:rsid="0036939e" officeooo:paragraph-rsid="01841e8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Futura Std Light1" fo:font-size="12pt" fo:font-style="normal" officeooo:rsid="0039d378" officeooo:paragraph-rsid="01841e8a"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Futura Std Light1" fo:font-size="12pt" fo:font-style="normal" officeooo:rsid="008dab97" officeooo:paragraph-rsid="01841e8a" style:font-size-asian="12pt" style:font-style-asian="normal" style:font-size-complex="12pt" style:font-style-complex="normal"/>
    </style:style>
    <style:style style:name="P16" style:family="paragraph" style:parent-style-name="Standard">
      <style:paragraph-properties fo:text-align="start" style:justify-single-word="false"/>
      <style:text-properties style:font-name="Futura Std Light1" fo:font-size="12pt" fo:font-style="normal" fo:font-weight="normal" officeooo:rsid="00356139" officeooo:paragraph-rsid="01796b86"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Futura Std Light1" fo:font-size="12pt" fo:font-style="normal" fo:font-weight="normal" officeooo:rsid="00356139" officeooo:paragraph-rsid="01841e8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Futura Std Light1" fo:font-size="12pt" fo:font-style="normal" fo:font-weight="normal" officeooo:rsid="00356139" officeooo:paragraph-rsid="018d5fb5"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Futura Std Light1" fo:font-size="12pt" fo:font-style="normal" fo:font-weight="normal" officeooo:rsid="00356139" officeooo:paragraph-rsid="018f99c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Futura Std Light1" fo:font-size="12pt" fo:font-style="normal" fo:font-weight="normal" officeooo:rsid="00356139" officeooo:paragraph-rsid="018d5fb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Futura Std Light1" fo:font-size="12pt" fo:font-style="normal" fo:font-weight="normal" officeooo:rsid="00356139" officeooo:paragraph-rsid="018f282a"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Futura Std Light1" fo:font-size="12pt" fo:font-style="normal" fo:font-weight="normal" officeooo:rsid="0039d378" officeooo:paragraph-rsid="01841e8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Futura Std Light1" fo:font-size="12pt" fo:font-style="normal" fo:font-weight="normal" officeooo:rsid="0147498b" officeooo:paragraph-rsid="01841e8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Futura Std Light1" fo:font-size="12pt" fo:font-style="normal" fo:font-weight="normal" officeooo:rsid="001c12f4" officeooo:paragraph-rsid="01841e8a"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Futura Std Light1" fo:font-size="12pt" officeooo:rsid="018b9acb" officeooo:paragraph-rsid="018d5fb5" style:font-size-asian="10.5pt" style:font-size-complex="12pt"/>
    </style:style>
    <style:style style:name="P26" style:family="paragraph" style:parent-style-name="Standard">
      <style:paragraph-properties fo:text-align="justify" style:justify-single-word="false"/>
      <style:text-properties style:font-name="Futura Std Light1" fo:font-size="12pt" officeooo:rsid="018b9acb" officeooo:paragraph-rsid="018f282a" style:font-size-asian="10.5pt" style:font-size-complex="12pt"/>
    </style:style>
    <style:style style:name="P27" style:family="paragraph" style:parent-style-name="Standard">
      <style:paragraph-properties fo:text-align="justify" style:justify-single-word="false"/>
      <style:text-properties style:font-name="Futura Std Light1" fo:font-size="12pt" officeooo:rsid="018f99cf" officeooo:paragraph-rsid="018f99cf" style:font-size-asian="10.5pt" style:font-size-complex="12pt"/>
    </style:style>
    <style:style style:name="P28" style:family="paragraph" style:parent-style-name="Standard">
      <style:paragraph-properties fo:text-align="justify" style:justify-single-word="false"/>
      <style:text-properties style:font-name="Futura Std Light1" fo:font-size="12pt" officeooo:rsid="018b9acb" officeooo:paragraph-rsid="018f282a" style:font-size-asian="12pt" style:font-size-complex="12pt"/>
    </style:style>
    <style:style style:name="P29" style:family="paragraph" style:parent-style-name="Standard">
      <style:text-properties style:font-name="Futura Std Light1" officeooo:rsid="001a5dd1"/>
    </style:style>
    <style:style style:name="P30" style:family="paragraph" style:parent-style-name="Standard">
      <style:paragraph-properties fo:text-align="center" style:justify-single-word="false"/>
      <style:text-properties style:font-name="Futura Std Light1" fo:font-style="normal" officeooo:rsid="0009666b" officeooo:paragraph-rsid="001a5dd1" style:font-style-asian="normal" style:font-style-complex="normal"/>
    </style:style>
    <style:style style:name="P31" style:family="paragraph" style:parent-style-name="Standard">
      <style:paragraph-properties fo:text-align="justify" style:justify-single-word="false"/>
      <style:text-properties style:font-name="Futura Std Light1" fo:font-style="normal" officeooo:rsid="0212cbda" officeooo:paragraph-rsid="01841e8a" style:font-style-asian="normal" style:font-style-complex="normal"/>
    </style:style>
    <style:style style:name="P32" style:family="paragraph" style:parent-style-name="Standard">
      <style:paragraph-properties fo:text-align="center" style:justify-single-word="false"/>
      <style:text-properties style:font-name="Futura Std Light1" fo:font-style="normal" fo:font-weight="normal" officeooo:rsid="00356139" officeooo:paragraph-rsid="0140acb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Futura Std Light1" fo:font-style="normal" fo:font-weight="bold" officeooo:rsid="0212cbda" officeooo:paragraph-rsid="01841e8a" style:font-style-asian="normal" style:font-weight-asian="bold" style:font-style-complex="normal" style:font-weight-complex="bold"/>
    </style:style>
    <style:style style:name="P34" style:family="paragraph" style:parent-style-name="Standard">
      <style:paragraph-properties fo:text-align="end" style:justify-single-word="false"/>
      <style:text-properties style:font-name="Futura Std Light1" fo:font-size="18pt" fo:font-style="normal" fo:font-weight="normal" officeooo:rsid="0051862f" officeooo:paragraph-rsid="01841e8a"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style:font-name="Futura Std Light1" fo:font-size="16pt" fo:font-style="normal" officeooo:rsid="001c12f4" officeooo:paragraph-rsid="0020cf3c" style:font-size-asian="16pt" style:font-style-asian="normal" style:font-size-complex="16pt" style:font-style-complex="normal"/>
    </style:style>
    <style:style style:name="P36" style:family="paragraph" style:parent-style-name="Standard">
      <style:paragraph-properties fo:text-align="start" style:justify-single-word="false"/>
      <style:text-properties style:font-name="Futura Std Light1" fo:font-size="16pt" fo:font-style="normal" officeooo:rsid="001c12f4" officeooo:paragraph-rsid="01841e8a" style:font-size-asian="16pt" style:font-style-asian="normal" style:font-size-complex="16pt" style:font-style-complex="normal"/>
    </style:style>
    <style:style style:name="P37" style:family="paragraph" style:parent-style-name="Standard">
      <style:paragraph-properties fo:text-align="end" style:justify-single-word="false"/>
      <style:text-properties style:font-name="Futura Std Light1" fo:font-size="16pt" officeooo:rsid="018b9acb" officeooo:paragraph-rsid="018f282a" style:font-size-asian="16pt" style:font-size-complex="16pt"/>
    </style:style>
    <style:style style:name="P38" style:family="paragraph" style:parent-style-name="Standard">
      <style:paragraph-properties fo:text-align="start" style:justify-single-word="false"/>
      <style:text-properties style:font-name="Futura Std Light1" officeooo:paragraph-rsid="01796b86"/>
    </style:style>
    <style:style style:name="P39" style:family="paragraph" style:parent-style-name="Standard">
      <style:paragraph-properties fo:text-align="start" style:justify-single-word="false"/>
      <style:text-properties style:font-name="Futura Std Light1" officeooo:paragraph-rsid="016171fd"/>
    </style:style>
    <style:style style:name="P40" style:family="paragraph" style:parent-style-name="Standard">
      <style:paragraph-properties fo:text-align="start" style:justify-single-word="false"/>
      <style:text-properties style:font-name="Futura Std Light1" officeooo:paragraph-rsid="01715427"/>
    </style:style>
    <style:style style:name="P41" style:family="paragraph" style:parent-style-name="Standard">
      <style:paragraph-properties fo:text-align="start" style:justify-single-word="false"/>
      <style:text-properties style:font-name="Futura Std Light1" officeooo:paragraph-rsid="01841e8a"/>
    </style:style>
    <style:style style:name="P42" style:family="paragraph" style:parent-style-name="Standard">
      <style:paragraph-properties fo:text-align="start" style:justify-single-word="false"/>
      <style:text-properties style:font-name="Futura Std Light1" officeooo:paragraph-rsid="017f500e"/>
    </style:style>
    <style:style style:name="P43" style:family="paragraph" style:parent-style-name="Standard">
      <style:paragraph-properties fo:text-align="start" style:justify-single-word="false"/>
      <style:text-properties style:font-name="Futura Std Light1" officeooo:paragraph-rsid="01891767"/>
    </style:style>
    <style:style style:name="P44" style:family="paragraph" style:parent-style-name="Standard">
      <style:paragraph-properties fo:text-align="justify" style:justify-single-word="false"/>
      <style:text-properties style:font-name="Futura Std Light1" officeooo:paragraph-rsid="01841e8a"/>
    </style:style>
    <style:style style:name="P45" style:family="paragraph" style:parent-style-name="Standard">
      <style:paragraph-properties fo:text-align="justify" style:justify-single-word="false"/>
      <style:text-properties style:font-name="Futura Std Light1" officeooo:paragraph-rsid="016171fd"/>
    </style:style>
    <style:style style:name="P46" style:family="paragraph" style:parent-style-name="Standard">
      <style:paragraph-properties fo:text-align="justify" style:justify-single-word="false"/>
      <style:text-properties style:font-name="Futura Std Light1" officeooo:paragraph-rsid="018b9acb"/>
    </style:style>
    <style:style style:name="P47" style:family="paragraph" style:parent-style-name="Standard">
      <style:paragraph-properties fo:text-align="center" style:justify-single-word="false"/>
      <style:text-properties style:font-name="Futura Std Light1" fo:font-style="italic" officeooo:rsid="01841e8a" officeooo:paragraph-rsid="0140acb9" style:font-style-asian="italic" style:font-style-complex="italic"/>
    </style:style>
    <style:style style:name="P48" style:family="paragraph" style:parent-style-name="Standard">
      <style:paragraph-properties fo:text-align="center" style:justify-single-word="false"/>
      <style:text-properties officeooo:paragraph-rsid="001a5dd1"/>
    </style:style>
    <style:style style:name="P49" style:family="paragraph" style:parent-style-name="Standard">
      <style:paragraph-properties fo:text-align="center" style:justify-single-word="false"/>
      <style:text-properties fo:color="#ffffff" style:font-name="FreeMono" fo:font-style="normal" fo:font-weight="bold" officeooo:rsid="0023ee9b" officeooo:paragraph-rsid="0023ee9b"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color="#ffffff" style:font-name="FreeMono" fo:font-style="normal" fo:font-weight="bold" officeooo:rsid="0212cbda" officeooo:paragraph-rsid="02138909" style:font-style-asian="normal" style:font-weight-asian="bold" style:font-style-complex="normal" style:font-weight-complex="bold"/>
    </style:style>
    <style:style style:name="P51" style:family="paragraph" style:parent-style-name="Standard">
      <style:paragraph-properties fo:text-align="center" style:justify-single-word="false"/>
      <style:text-properties fo:color="#ffffff" style:font-name="FreeMono" fo:font-style="normal" fo:font-weight="bold" officeooo:rsid="018a3275" officeooo:paragraph-rsid="018a3275"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color="#ffffff" style:font-name="FreeMono1" fo:font-size="12pt" fo:font-style="normal" fo:font-weight="bold" officeooo:rsid="00490635" officeooo:paragraph-rsid="02138909"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color="#ffffff" style:font-name="FreeMono1" fo:font-size="12pt" fo:font-style="normal" fo:font-weight="bold" officeooo:rsid="00490635" officeooo:paragraph-rsid="0036939e"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color="#ffffff" style:font-name="FreeMono1" fo:font-style="normal" fo:font-weight="bold" officeooo:rsid="0036939e" officeooo:paragraph-rsid="0188b3c0"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color="#ffffff" style:font-name="FreeMono1" fo:font-style="normal" fo:font-weight="bold" officeooo:rsid="018d5fb5" officeooo:paragraph-rsid="018d5fb5"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officeooo:paragraph-rsid="0187cf9e"/>
    </style:style>
    <style:style style:name="P57" style:family="paragraph" style:parent-style-name="Standard">
      <style:paragraph-properties fo:text-align="center" style:justify-single-word="false"/>
      <style:text-properties fo:color="#999999" style:font-name="Futura Std Light1" fo:font-size="12pt" fo:font-style="italic" fo:font-weight="normal" officeooo:rsid="01881edb" officeooo:paragraph-rsid="01881edb"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fo:font-size="12pt" officeooo:rsid="018b9acb" officeooo:paragraph-rsid="018b9acb" style:font-size-asian="10.5pt" style:font-size-complex="12pt"/>
    </style:style>
    <style:style style:name="P59" style:family="paragraph" style:parent-style-name="Standard">
      <style:paragraph-properties fo:text-align="justify" style:justify-single-word="false"/>
      <style:text-properties officeooo:paragraph-rsid="018a3275"/>
    </style:style>
    <style:style style:name="P60" style:family="paragraph" style:parent-style-name="Standard">
      <style:paragraph-properties fo:text-align="justify" style:justify-single-word="false"/>
      <style:text-properties officeooo:paragraph-rsid="018b9acb"/>
    </style:style>
    <style:style style:name="P61" style:family="paragraph" style:parent-style-name="Footer">
      <style:paragraph-properties fo:text-align="center" style:justify-single-word="false"/>
      <style:text-properties fo:color="#999999" style:font-name="Futura Std" fo:font-style="italic" fo:font-weight="bold" officeooo:rsid="002fb127" officeooo:paragraph-rsid="002fb127" style:font-style-asian="italic" style:font-weight-asian="bold" style:font-style-complex="italic" style:font-weight-complex="bold"/>
    </style:style>
    <style:style style:name="P62" style:family="paragraph" style:parent-style-name="Footer">
      <style:paragraph-properties fo:text-align="center" style:justify-single-word="false"/>
      <style:text-properties fo:color="#999999" style:font-name="Futura Std Light1" fo:font-size="12pt" fo:font-style="italic" fo:font-weight="bold" officeooo:rsid="002fb127" officeooo:paragraph-rsid="01841e8a" style:font-size-asian="10.5pt" style:font-style-asian="italic" style:font-weight-asian="bold" style:font-size-complex="12pt" style:font-style-complex="italic" style:font-weight-complex="bold"/>
    </style:style>
    <style:style style:name="P63" style:family="paragraph" style:parent-style-name="Footer">
      <style:text-properties style:font-name="Futura Std" officeooo:rsid="002fb127" officeooo:paragraph-rsid="002fb127"/>
    </style:style>
    <style:style style:name="P64" style:family="paragraph" style:parent-style-name="Footer">
      <style:text-properties style:font-name="Futura" officeooo:rsid="002eae5b" officeooo:paragraph-rsid="015c6a5d"/>
    </style:style>
    <style:style style:name="P65" style:family="paragraph" style:parent-style-name="Footer">
      <style:paragraph-properties fo:text-align="center" style:justify-single-word="false"/>
      <style:text-properties style:font-name="Futura Std Light1" officeooo:paragraph-rsid="00356139"/>
    </style:style>
    <style:style style:name="P66" style:family="paragraph" style:parent-style-name="Table_20_Contents">
      <style:paragraph-properties fo:text-align="end" style:justify-single-word="false"/>
      <style:text-properties style:font-name="Futura Std Light1" officeooo:paragraph-rsid="015c6a5d"/>
    </style:style>
    <style:style style:name="P67" style:family="paragraph" style:parent-style-name="Table_20_Contents">
      <style:paragraph-properties fo:text-align="center" style:justify-single-word="false"/>
      <style:text-properties style:font-name="Futura Std Light1" fo:font-size="10pt" officeooo:rsid="00161285" officeooo:paragraph-rsid="00161285" style:font-size-asian="10pt" style:font-size-complex="10pt"/>
    </style:style>
    <style:style style:name="P68" style:family="paragraph" style:parent-style-name="Table_20_Contents">
      <style:paragraph-properties fo:text-align="start" style:justify-single-word="false"/>
      <style:text-properties style:font-name="Futura Std Light1" officeooo:rsid="00356139" officeooo:paragraph-rsid="00356139"/>
    </style:style>
    <style:style style:name="P69" style:family="paragraph" style:parent-style-name="Standard">
      <style:paragraph-properties fo:text-align="end" style:justify-single-word="false" fo:break-before="page"/>
      <style:text-properties officeooo:paragraph-rsid="01796b86"/>
    </style:style>
    <style:style style:name="P70" style:family="paragraph" style:parent-style-name="Standard">
      <style:paragraph-properties fo:text-align="end" style:justify-single-word="false" fo:break-before="page"/>
      <style:text-properties officeooo:paragraph-rsid="016171fd"/>
    </style:style>
    <style:style style:name="P71" style:family="paragraph" style:parent-style-name="Standard">
      <style:paragraph-properties fo:text-align="end" style:justify-single-word="false" fo:break-before="page"/>
      <style:text-properties officeooo:paragraph-rsid="018d5fb5"/>
    </style:style>
    <style:style style:name="P72" style:family="paragraph" style:parent-style-name="Standard">
      <style:paragraph-properties fo:text-align="end" style:justify-single-word="false" fo:break-before="page"/>
      <style:text-properties officeooo:paragraph-rsid="018f282a"/>
    </style:style>
    <style:style style:name="P73" style:family="paragraph" style:parent-style-name="Footer">
      <style:paragraph-properties fo:text-align="end" style:justify-single-word="false" fo:break-before="page"/>
      <style:text-properties style:font-name="Futura Std Light1" fo:font-size="24pt" fo:font-style="normal" officeooo:rsid="001c12f4" officeooo:paragraph-rsid="01841e8a" style:font-size-asian="24pt" style:font-style-asian="normal" style:font-size-complex="24pt" style:font-style-complex="normal"/>
    </style:style>
    <style:style style:name="P74" style:family="paragraph" style:parent-style-name="Standard">
      <style:paragraph-properties fo:text-align="center" style:justify-single-word="false"/>
      <style:text-properties style:font-name="Mephisto™" fo:font-size="80pt" fo:font-style="normal" fo:font-weight="normal" officeooo:rsid="01881edb" officeooo:paragraph-rsid="01881edb" style:font-size-asian="80pt" style:font-style-asian="normal" style:font-weight-asian="normal" style:font-size-complex="80pt" style:font-style-complex="normal" style:font-weight-complex="normal"/>
    </style:style>
    <style:style style:name="P75" style:family="paragraph" style:parent-style-name="Standard">
      <style:paragraph-properties fo:text-align="start" style:justify-single-word="false"/>
      <style:text-properties style:font-name="Futura Std Light1" fo:font-size="16pt" fo:font-style="normal" officeooo:rsid="015c6a5d" officeooo:paragraph-rsid="01891767" style:font-size-asian="16pt" style:font-style-asian="normal" style:font-size-complex="16pt" style:font-style-complex="normal"/>
    </style:style>
    <style:style style:name="P76" style:family="paragraph" style:parent-style-name="Standard">
      <style:paragraph-properties fo:text-align="end" style:justify-single-word="false"/>
      <style:text-properties style:font-name="Futura Std Light1" fo:font-size="16pt" fo:font-weight="normal" officeooo:rsid="018f99cf" officeooo:paragraph-rsid="018f99cf" style:font-size-asian="16pt" style:font-weight-asian="normal" style:font-size-complex="16pt" style:font-weight-complex="normal"/>
    </style:style>
    <style:style style:name="P77" style:family="paragraph" style:parent-style-name="Standard">
      <style:paragraph-properties fo:text-align="end" style:justify-single-word="false"/>
      <style:text-properties style:font-name="Futura Std Light1" fo:font-size="12pt" fo:font-style="normal" fo:font-weight="normal" officeooo:rsid="01808634" officeooo:paragraph-rsid="016171fd"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end" style:justify-single-word="false"/>
      <style:text-properties style:font-name="Futura Std Light1" fo:font-size="12pt" fo:font-style="normal" fo:font-weight="normal" officeooo:rsid="01808634" officeooo:paragraph-rsid="018d5fb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end" style:justify-single-word="false"/>
      <style:text-properties style:font-name="Futura Std Light1" fo:font-size="12pt" fo:font-style="normal" fo:font-weight="normal" officeooo:rsid="01808634" officeooo:paragraph-rsid="018f282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end" style:justify-single-word="false"/>
      <style:text-properties style:font-name="Futura Std Light1" fo:font-size="12pt" fo:font-style="normal" fo:font-weight="normal" officeooo:rsid="01808634" officeooo:paragraph-rsid="01a7bc0d"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end" style:justify-single-word="false"/>
      <style:text-properties style:font-name="Futura Std Light1" fo:font-size="12pt" fo:font-style="normal" fo:font-weight="normal" officeooo:rsid="01808634" officeooo:paragraph-rsid="01b0f123"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Futura Std Light1" fo:font-size="12pt" fo:font-style="normal" fo:font-weight="normal" officeooo:rsid="018b9acb" officeooo:paragraph-rsid="016171fd"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Futura Std Light1" fo:font-size="12pt" fo:font-style="normal" fo:font-weight="normal" officeooo:rsid="00356139" officeooo:paragraph-rsid="01a7800d"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Futura Std Light1" fo:font-size="12pt" fo:font-style="normal" fo:font-weight="normal" officeooo:rsid="00356139" officeooo:paragraph-rsid="01a7bc0d"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Futura Std Light1" fo:font-size="12pt" fo:font-style="normal" fo:font-weight="normal" officeooo:rsid="00356139" officeooo:paragraph-rsid="01abfa6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Futura Std Light1" fo:font-size="12pt" fo:font-style="normal" fo:font-weight="normal" officeooo:rsid="00356139" officeooo:paragraph-rsid="01a7800d"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Futura Std Light1" fo:font-size="12pt" fo:font-style="normal" fo:font-weight="normal" officeooo:rsid="00356139" officeooo:paragraph-rsid="01a7bc0d"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Futura Std Light1" fo:font-size="12pt" fo:font-style="normal" fo:font-weight="normal" officeooo:rsid="00356139" officeooo:paragraph-rsid="01abfa6b"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Futura Std Light1" fo:font-size="12pt" fo:font-style="normal" fo:font-weight="normal" officeooo:rsid="001c12f4" officeooo:paragraph-rsid="01aa2800"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Futura Std Light1" fo:font-size="12pt" fo:font-style="normal" fo:font-weight="normal" officeooo:rsid="018b9acb" officeooo:paragraph-rsid="01a0138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Futura Std Light1" fo:font-size="12pt" officeooo:rsid="018f99cf" officeooo:paragraph-rsid="018f99cf" style:font-size-asian="10.5pt" style:font-size-complex="12pt"/>
    </style:style>
    <style:style style:name="P92" style:family="paragraph" style:parent-style-name="Standard">
      <style:paragraph-properties fo:text-align="justify" style:justify-single-word="false"/>
      <style:text-properties style:font-name="Futura Std Light1" fo:font-style="normal" officeooo:rsid="0212cbda" officeooo:paragraph-rsid="01aa2800" style:font-style-asian="normal" style:font-style-complex="normal"/>
    </style:style>
    <style:style style:name="P93" style:family="paragraph" style:parent-style-name="Standard">
      <style:paragraph-properties fo:text-align="start" style:justify-single-word="false"/>
      <style:text-properties style:font-name="Futura Std Light1" fo:font-style="normal" fo:font-weight="bold" officeooo:rsid="0212cbda" officeooo:paragraph-rsid="01aa2800"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style:font-name="Futura Std Light1" officeooo:paragraph-rsid="01841e8a"/>
    </style:style>
    <style:style style:name="P95" style:family="paragraph" style:parent-style-name="Standard">
      <style:paragraph-properties fo:text-align="justify" style:justify-single-word="false"/>
      <style:text-properties style:font-name="Futura Std Light1" officeooo:paragraph-rsid="01b2cbc2"/>
    </style:style>
    <style:style style:name="P96" style:family="paragraph" style:parent-style-name="Standard">
      <style:paragraph-properties fo:text-align="justify" style:justify-single-word="false"/>
      <style:text-properties style:font-name="Futura Std Light" fo:font-size="12pt" fo:font-style="normal" fo:font-weight="normal" officeooo:rsid="017c6c1c" officeooo:paragraph-rsid="018a3275"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Futura Std Light" fo:font-size="12pt" fo:font-style="normal" fo:font-weight="normal" officeooo:rsid="017c6c1c" officeooo:paragraph-rsid="018b9acb"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Futura Std Light" fo:font-size="12pt" fo:font-style="normal" fo:font-weight="normal" officeooo:rsid="018b9acb" officeooo:paragraph-rsid="018b9acb"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Futura Std Light" fo:font-size="12pt" fo:font-style="normal" fo:font-weight="normal" officeooo:rsid="01865db2" officeooo:paragraph-rsid="018d5fb5"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Futura Std Light" fo:font-size="12pt" fo:font-style="normal" fo:font-weight="normal" officeooo:rsid="01865db2" officeooo:paragraph-rsid="018f99c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Futura Std Light" fo:font-size="12pt" fo:font-style="normal" fo:font-weight="normal" officeooo:rsid="01865db2" officeooo:paragraph-rsid="01a7800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Futura Std Light" fo:font-size="12pt" fo:font-style="normal" fo:font-weight="normal" officeooo:rsid="01865db2" officeooo:paragraph-rsid="01a7bc0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Futura Std Light" fo:font-size="12pt" fo:font-style="normal" fo:font-weight="normal" officeooo:rsid="01865db2" officeooo:paragraph-rsid="01aa280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Futura Std Light" fo:font-size="12pt" fo:font-style="normal" fo:font-weight="normal" officeooo:rsid="01865db2" officeooo:paragraph-rsid="01abfa6b"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Futura Std Light" fo:font-size="12pt" fo:font-style="normal" fo:font-weight="normal" officeooo:rsid="018d5fb5" officeooo:paragraph-rsid="018d5fb5"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Futura Std Light" fo:font-size="12pt" fo:font-style="normal" fo:font-weight="normal" officeooo:rsid="018f282a" officeooo:paragraph-rsid="018f282a"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end" style:justify-single-word="false"/>
      <style:text-properties style:font-name="Futura Std Light" fo:font-size="12pt" fo:font-style="normal" fo:font-weight="normal" officeooo:rsid="018f282a" officeooo:paragraph-rsid="018f282a"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center" style:justify-single-word="false"/>
      <style:text-properties style:font-name="Futura Std Light" fo:font-size="12pt" fo:font-style="normal" fo:font-weight="normal" officeooo:rsid="018b9acb" officeooo:paragraph-rsid="018b9acb"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end" style:justify-single-word="false"/>
      <style:text-properties style:font-name="Futura Std Light" fo:font-size="12pt" fo:font-style="normal" fo:font-weight="normal" officeooo:rsid="018f99cf" officeooo:paragraph-rsid="018f99cf"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end" style:justify-single-word="false"/>
      <style:text-properties style:font-name="Futura Std Light" fo:font-size="12pt" fo:font-style="normal" fo:font-weight="normal" officeooo:rsid="018f99cf" officeooo:paragraph-rsid="019934cf"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end" style:justify-single-word="false"/>
      <style:text-properties style:font-name="Futura Std Light" fo:font-size="12pt" fo:font-style="normal" fo:font-weight="normal" officeooo:rsid="018f99cf" officeooo:paragraph-rsid="01a5a1f8"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end" style:justify-single-word="false"/>
      <style:text-properties style:font-name="Futura Std Light" fo:font-size="12pt" fo:font-style="normal" fo:font-weight="normal" officeooo:rsid="018f99cf" officeooo:paragraph-rsid="01a7bc0d"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end" style:justify-single-word="false"/>
      <style:text-properties style:font-name="Futura Std Light" fo:font-size="12pt" fo:font-style="normal" fo:font-weight="normal" officeooo:rsid="018f99cf" officeooo:paragraph-rsid="01abfa6b"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Futura Std Light" fo:font-size="12pt" fo:font-style="normal" fo:font-weight="normal" officeooo:rsid="019149ab" officeooo:paragraph-rsid="018f99c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Futura Std Light" fo:font-size="12pt" fo:font-style="normal" fo:font-weight="normal" officeooo:rsid="0192709d" officeooo:paragraph-rsid="018f99cf"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Futura Std Light" fo:font-size="12pt" fo:font-style="normal" fo:font-weight="normal" officeooo:rsid="01929717" officeooo:paragraph-rsid="018f99c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style:text-properties style:font-name="Futura Std Light" fo:font-size="18pt" fo:font-style="normal" fo:font-weight="normal" officeooo:rsid="018b9acb" officeooo:paragraph-rsid="018b9acb"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center" style:justify-single-word="false"/>
      <style:text-properties style:font-name="Futura Std Light" fo:font-size="18pt" fo:font-style="normal" fo:font-weight="bold" officeooo:rsid="018b9acb" officeooo:paragraph-rsid="018b9acb" style:font-size-asian="18pt" style:font-style-asian="normal" style:font-weight-asian="bold" style:font-size-complex="18pt" style:font-style-complex="normal" style:font-weight-complex="bold"/>
    </style:style>
    <style:style style:name="P119" style:family="paragraph" style:parent-style-name="Standard">
      <style:paragraph-properties fo:text-align="end" style:justify-single-word="false"/>
      <style:text-properties style:font-name="Futura Std Light" fo:font-size="16pt" fo:font-style="normal" fo:font-weight="normal" officeooo:rsid="019934cf" officeooo:paragraph-rsid="019934cf" style:font-size-asian="16pt" style:font-style-asian="normal" style:font-weight-asian="normal" style:font-size-complex="16pt" style:font-style-complex="normal" style:font-weight-complex="normal"/>
    </style:style>
    <style:style style:name="P120" style:family="paragraph" style:parent-style-name="Standard">
      <style:paragraph-properties fo:text-align="end" style:justify-single-word="false"/>
      <style:text-properties style:font-name="Futura Std Light" fo:font-size="16pt" fo:font-style="normal" fo:font-weight="normal" officeooo:rsid="01a7bc0d" officeooo:paragraph-rsid="01a7bc0d" style:font-size-asian="16pt" style:font-style-asian="normal" style:font-weight-asian="normal" style:font-size-complex="16pt" style:font-style-complex="normal" style:font-weight-complex="normal"/>
    </style:style>
    <style:style style:name="P121" style:family="paragraph" style:parent-style-name="Standard">
      <style:paragraph-properties fo:text-align="end" style:justify-single-word="false"/>
      <style:text-properties style:font-name="Futura Std Light" fo:font-size="16pt" fo:font-style="normal" fo:font-weight="normal" officeooo:rsid="01abfa6b" officeooo:paragraph-rsid="01abfa6b" style:font-size-asian="16pt" style:font-style-asian="normal" style:font-weight-asian="normal" style:font-size-complex="16pt" style:font-style-complex="normal" style:font-weight-complex="normal"/>
    </style:style>
    <style:style style:name="P122" style:family="paragraph" style:parent-style-name="Standard">
      <style:paragraph-properties fo:text-align="start" style:justify-single-word="false"/>
      <style:text-properties fo:color="#ffffff" style:font-name="FreeMono1" fo:font-size="12pt" fo:font-style="normal" fo:font-weight="bold" officeooo:rsid="005396c3" officeooo:paragraph-rsid="018d5fb5" style:font-size-asian="12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color="#ffffff" style:font-name="FreeMono1" fo:font-size="12pt" fo:font-style="normal" fo:font-weight="bold" officeooo:rsid="018f99cf" officeooo:paragraph-rsid="0188b3c0" style:font-size-asian="12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color="#ffffff" style:font-name="FreeMono" fo:font-size="12pt" fo:font-style="normal" fo:font-weight="bold" officeooo:rsid="00490635" officeooo:paragraph-rsid="02138909" style:font-size-asian="12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ffffff" style:font-name="FreeMono" fo:font-size="12pt" fo:font-style="normal" fo:font-weight="bold" officeooo:rsid="018f99cf" officeooo:paragraph-rsid="0188b3c0" style:font-size-asian="12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color="#ffffff" style:font-name="FreeMono" fo:font-style="normal" fo:font-weight="bold" officeooo:rsid="0036939e" officeooo:paragraph-rsid="0188b3c0" style:font-style-asian="normal" style:font-weight-asian="bold" style:font-style-complex="normal" style:font-weight-complex="bold"/>
    </style:style>
    <style:style style:name="P127" style:family="paragraph" style:parent-style-name="Standard">
      <style:paragraph-properties fo:text-align="start" style:justify-single-word="false"/>
      <style:text-properties fo:color="#ffffff" style:font-name="FreeMono" fo:font-size="10pt" fo:font-style="normal" fo:font-weight="bold" officeooo:rsid="018f99cf" officeooo:paragraph-rsid="0188b3c0" style:font-size-asian="10pt" style:font-style-asian="normal" style:font-weight-asian="bold" style:font-size-complex="10pt" style:font-style-complex="normal" style:font-weight-complex="bold"/>
    </style:style>
    <style:style style:name="P128" style:family="paragraph" style:parent-style-name="Standard">
      <style:paragraph-properties fo:text-align="start" style:justify-single-word="false"/>
      <style:text-properties fo:color="#ffffff" style:font-name="FreeMono" fo:font-size="10pt" fo:font-style="normal" fo:font-weight="bold" officeooo:rsid="0212cbda" officeooo:paragraph-rsid="02138909" style:font-size-asian="10pt" style:font-style-asian="normal" style:font-weight-asian="bold" style:font-size-complex="10pt" style:font-style-complex="normal" style:font-weight-complex="bold"/>
    </style:style>
    <style:style style:name="P129" style:family="paragraph" style:parent-style-name="Standard">
      <style:paragraph-properties fo:text-align="center" style:justify-single-word="false"/>
      <style:text-properties fo:color="#ffffff" style:font-name="FreeMono" fo:font-size="10pt" fo:font-style="normal" fo:font-weight="bold" officeooo:rsid="01aa2800" officeooo:paragraph-rsid="01aa2800" style:font-size-asian="10pt" style:font-style-asian="normal" style:font-weight-asian="bold" style:font-size-complex="10pt" style:font-style-complex="normal" style:font-weight-complex="bold"/>
    </style:style>
    <style:style style:name="P130" style:family="paragraph" style:parent-style-name="Standard">
      <style:paragraph-properties fo:text-align="justify" style:justify-single-word="false"/>
      <style:text-properties officeooo:paragraph-rsid="018d5fb5"/>
    </style:style>
    <style:style style:name="P131" style:family="paragraph" style:parent-style-name="Standard">
      <style:paragraph-properties fo:text-align="justify" style:justify-single-word="false"/>
      <style:text-properties officeooo:paragraph-rsid="019934cf"/>
    </style:style>
    <style:style style:name="P132" style:family="paragraph" style:parent-style-name="Standard">
      <style:paragraph-properties fo:text-align="justify" style:justify-single-word="false"/>
      <style:text-properties officeooo:paragraph-rsid="01a5a1f8"/>
    </style:style>
    <style:style style:name="P133" style:family="paragraph" style:parent-style-name="Standard">
      <style:paragraph-properties fo:text-align="justify" style:justify-single-word="false"/>
      <style:text-properties officeooo:paragraph-rsid="01a7bc0d"/>
    </style:style>
    <style:style style:name="P134" style:family="paragraph" style:parent-style-name="Standard">
      <style:paragraph-properties fo:text-align="justify" style:justify-single-word="false"/>
      <style:text-properties officeooo:paragraph-rsid="01abfa6b"/>
    </style:style>
    <style:style style:name="P135" style:family="paragraph" style:parent-style-name="Standard">
      <style:paragraph-properties fo:text-align="justify" style:justify-single-word="false"/>
      <style:text-properties officeooo:paragraph-rsid="01b0f123"/>
    </style:style>
    <style:style style:name="P136" style:family="paragraph" style:parent-style-name="Standard">
      <style:paragraph-properties fo:text-align="end" style:justify-single-word="false"/>
      <style:text-properties officeooo:rsid="019934cf" officeooo:paragraph-rsid="01a5a1f8"/>
    </style:style>
    <style:style style:name="P137" style:family="paragraph" style:parent-style-name="Standard">
      <style:paragraph-properties fo:text-align="justify" style:justify-single-word="false"/>
      <style:text-properties officeooo:rsid="01a3d25f" officeooo:paragraph-rsid="01a3d25f"/>
    </style:style>
    <style:style style:name="P138" style:family="paragraph" style:parent-style-name="Standard">
      <style:paragraph-properties fo:text-align="justify" style:justify-single-word="false"/>
      <style:text-properties officeooo:rsid="01a5a1f8" officeooo:paragraph-rsid="01a5a1f8"/>
    </style:style>
    <style:style style:name="P139" style:family="paragraph" style:parent-style-name="Standard">
      <style:paragraph-properties fo:text-align="justify" style:justify-single-word="false"/>
      <style:text-properties officeooo:rsid="01a5a1f8" officeooo:paragraph-rsid="01a7bc0d"/>
    </style:style>
    <style:style style:name="P140" style:family="paragraph" style:parent-style-name="Standard">
      <style:paragraph-properties fo:text-align="justify" style:justify-single-word="false"/>
      <style:text-properties officeooo:rsid="01a5a1f8" officeooo:paragraph-rsid="01abfa6b"/>
    </style:style>
    <style:style style:name="P141" style:family="paragraph" style:parent-style-name="Standard">
      <style:paragraph-properties fo:text-align="start" style:justify-single-word="false"/>
      <style:text-properties officeooo:paragraph-rsid="0188b3c0"/>
    </style:style>
    <style:style style:name="P142" style:family="paragraph" style:parent-style-name="Standard">
      <style:paragraph-properties fo:text-align="start" style:justify-single-word="false"/>
      <style:text-properties officeooo:paragraph-rsid="01abfa6b"/>
    </style:style>
    <style:style style:name="P143" style:family="paragraph" style:parent-style-name="Standard">
      <style:paragraph-properties fo:text-align="start" style:justify-single-word="false"/>
      <style:text-properties fo:font-size="10pt" officeooo:paragraph-rsid="0188b3c0" style:font-size-asian="10pt" style:font-size-complex="10pt"/>
    </style:style>
    <style:style style:name="P144" style:family="paragraph" style:parent-style-name="Standard">
      <style:paragraph-properties fo:text-align="start" style:justify-single-word="false"/>
      <style:text-properties fo:font-size="10pt" officeooo:paragraph-rsid="02138909" style:font-size-asian="10pt" style:font-size-complex="10pt"/>
    </style:style>
    <style:style style:name="P145" style:family="paragraph" style:parent-style-name="Standard">
      <style:paragraph-properties fo:text-align="start" style:justify-single-word="false"/>
      <style:text-properties fo:font-size="10pt" officeooo:paragraph-rsid="01aa2253" style:font-size-asian="10pt" style:font-size-complex="10pt"/>
    </style:style>
    <style:style style:name="P146" style:family="paragraph" style:parent-style-name="Standard">
      <style:paragraph-properties fo:text-align="start" style:justify-single-word="false"/>
      <style:text-properties style:font-name="FreeMono" fo:font-size="10pt" officeooo:paragraph-rsid="02138909" style:font-size-asian="10pt" style:font-size-complex="10pt"/>
    </style:style>
    <style:style style:name="P147" style:family="paragraph" style:parent-style-name="Standard">
      <style:paragraph-properties fo:text-align="start" style:justify-single-word="false"/>
      <style:text-properties style:font-name="FreeMono" fo:font-size="10pt" officeooo:paragraph-rsid="0188b3c0" style:font-size-asian="10pt" style:font-size-complex="10pt"/>
    </style:style>
    <style:style style:name="P148" style:family="paragraph" style:parent-style-name="Standard">
      <style:paragraph-properties fo:text-align="justify" style:justify-single-word="false"/>
      <style:text-properties officeooo:rsid="01b0f123" officeooo:paragraph-rsid="01b0f123"/>
    </style:style>
    <style:style style:name="P149" style:family="paragraph" style:parent-style-name="Standard">
      <style:paragraph-properties fo:text-align="end" style:justify-single-word="false" fo:break-before="page"/>
      <style:text-properties style:font-name="Futura Std Light" fo:font-size="16pt" fo:font-style="normal" fo:font-weight="normal" officeooo:rsid="01a5a1f8" officeooo:paragraph-rsid="01a5a1f8" style:font-size-asian="16pt" style:font-style-asian="normal" style:font-weight-asian="normal" style:font-size-complex="16pt" style:font-style-complex="normal" style:font-weight-complex="normal"/>
    </style:style>
    <style:style style:name="P150" style:family="paragraph" style:parent-style-name="Standard">
      <style:paragraph-properties fo:text-align="end" style:justify-single-word="false" fo:break-before="page"/>
      <style:text-properties officeooo:paragraph-rsid="01841e8a"/>
    </style:style>
    <style:style style:name="P151" style:family="paragraph" style:parent-style-name="Standard">
      <style:paragraph-properties fo:text-align="end" style:justify-single-word="false" fo:break-before="page"/>
      <style:text-properties officeooo:paragraph-rsid="01a7bc0d"/>
    </style:style>
    <style:style style:name="P152" style:family="paragraph" style:parent-style-name="Standard">
      <style:paragraph-properties fo:text-align="end" style:justify-single-word="false" fo:break-before="page"/>
      <style:text-properties officeooo:paragraph-rsid="01b0f123"/>
    </style:style>
    <style:style style:name="P153" style:family="paragraph" style:parent-style-name="Table_20_Contents">
      <style:paragraph-properties fo:text-align="end" style:justify-single-word="false"/>
      <style:text-properties style:font-name="Futura Std Light1" officeooo:rsid="01a0b8fe" officeooo:paragraph-rsid="01a0b8fe"/>
    </style:style>
    <style:style style:name="P154" style:family="paragraph">
      <style:paragraph-properties fo:text-align="center"/>
      <style:text-properties fo:font-size="13pt" style:font-size-asian="13pt" style:font-size-complex="13pt"/>
    </style:style>
    <style:style style:name="P155" style:family="paragraph">
      <loext:graphic-properties draw:fill="none" draw:fill-color="#ffffff"/>
      <style:paragraph-properties fo:text-align="center" style:writing-mode="lr-tb"/>
      <style:text-properties fo:color="#ffffff" style:text-outline="false" style:font-name="Futura Std Light" fo:font-size="13pt" fo:font-weight="bold" style:font-size-asian="13pt" style:font-weight-asian="bold" style:font-size-complex="13pt" style:font-weight-complex="bold"/>
    </style:style>
    <style:style style:name="T1" style:family="text">
      <style:text-properties fo:color="#ff0000"/>
    </style:style>
    <style:style style:name="T2" style:family="text">
      <style:text-properties fo:color="#ff0000" style:font-name="Mephisto™" fo:font-size="14pt" fo:font-style="normal" fo:font-weight="bold" officeooo:rsid="01881edb" style:font-size-asian="14pt" style:font-style-asian="normal" style:font-weight-asian="bold" style:font-size-complex="14pt" style:font-style-complex="normal" style:font-weight-complex="bold"/>
    </style:style>
    <style:style style:name="T3" style:family="text">
      <style:text-properties fo:color="#ff0000" style:font-name="Mephisto™" fo:font-size="14pt" officeooo:rsid="01881edb" style:font-size-asian="14pt" style:font-size-complex="14pt"/>
    </style:style>
    <style:style style:name="T4" style:family="text">
      <style:text-properties fo:color="#ff0000" fo:font-size="12pt" officeooo:rsid="018f99cf" style:font-size-asian="12pt" style:font-size-complex="12pt"/>
    </style:style>
    <style:style style:name="T5" style:family="text">
      <style:text-properties fo:color="#ff0000" style:font-name="FreeMono" fo:font-size="12pt" fo:font-style="normal" fo:font-weight="bold" officeooo:rsid="018f99cf" style:font-size-asian="12pt" style:font-style-asian="normal" style:font-weight-asian="bold" style:font-size-complex="12pt" style:font-style-complex="normal" style:font-weight-complex="bold"/>
    </style:style>
    <style:style style:name="T6" style:family="text">
      <style:text-properties fo:color="#ff0000" style:font-name="FreeMono" fo:font-size="12pt" fo:font-style="normal" fo:font-weight="bold" officeooo:rsid="01a7bc0d" style:font-size-asian="12pt" style:font-style-asian="normal" style:font-weight-asian="bold" style:font-size-complex="12pt" style:font-style-complex="normal" style:font-weight-complex="bold"/>
    </style:style>
    <style:style style:name="T7" style:family="text">
      <style:text-properties fo:color="#ff0000" style:font-name="FreeMono" fo:font-style="normal" fo:font-weight="bold" officeooo:rsid="01a7bc0d" style:font-style-asian="normal" style:font-weight-asian="bold" style:font-style-complex="normal" style:font-weight-complex="bold"/>
    </style:style>
    <style:style style:name="T8" style:family="text">
      <style:text-properties fo:color="#ff0000" style:font-name="FreeMono" fo:font-style="normal" fo:font-weight="bold" officeooo:rsid="018f99cf" style:font-style-asian="normal" style:font-weight-asian="bold" style:font-style-complex="normal" style:font-weight-complex="bold"/>
    </style:style>
    <style:style style:name="T9" style:family="text">
      <style:text-properties fo:color="#ff0000" style:font-name="FreeMono" fo:font-size="10pt" fo:font-style="normal" fo:font-weight="bold" officeooo:rsid="018f99cf" style:font-size-asian="10pt" style:font-style-asian="normal" style:font-weight-asian="bold" style:font-size-complex="10pt" style:font-style-complex="normal" style:font-weight-complex="bold"/>
    </style:style>
    <style:style style:name="T10" style:family="text">
      <style:text-properties fo:color="#ff0000" style:font-name="FreeMono" fo:font-size="10pt" fo:font-style="normal" fo:font-weight="bold" officeooo:rsid="01a7bc0d" style:font-size-asian="10pt" style:font-style-asian="normal" style:font-weight-asian="bold" style:font-size-complex="10pt" style:font-style-complex="normal" style:font-weight-complex="bold"/>
    </style:style>
    <style:style style:name="T11" style:family="text">
      <style:text-properties fo:color="#ff0000" fo:font-style="normal" fo:font-weight="bold" officeooo:rsid="018f99cf" style:font-style-asian="normal" style:font-weight-asian="bold" style:font-style-complex="normal" style:font-weight-complex="bold"/>
    </style:style>
    <style:style style:name="T12" style:family="text">
      <style:text-properties fo:color="#ff0000" fo:font-style="normal" fo:font-weight="bold" officeooo:rsid="01abfa6b" style:font-style-asian="normal" style:font-weight-asian="bold" style:font-style-complex="normal" style:font-weight-complex="bold"/>
    </style:style>
    <style:style style:name="T13" style:family="text">
      <style:text-properties officeooo:rsid="01841e8a"/>
    </style:style>
    <style:style style:name="T14" style:family="text">
      <style:text-properties fo:font-weight="bold" style:font-weight-asian="bold" style:font-weight-complex="bold"/>
    </style:style>
    <style:style style:name="T15" style:family="text">
      <style:text-properties fo:font-weight="bold" officeooo:rsid="018a3275" style:font-weight-asian="bold" style:font-weight-complex="bold"/>
    </style:style>
    <style:style style:name="T16" style:family="text">
      <style:text-properties fo:font-weight="bold" officeooo:rsid="01aa2800" style:font-size-asian="10.5pt"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8a3275" style:font-weight-asian="normal" style:font-weight-complex="normal"/>
    </style:style>
    <style:style style:name="T19" style:family="text">
      <style:text-properties officeooo:rsid="0045d3cf"/>
    </style:style>
    <style:style style:name="T20" style:family="text">
      <style:text-properties fo:color="#ffff00"/>
    </style:style>
    <style:style style:name="T21" style:family="text">
      <style:text-properties fo:color="#ffff00" fo:font-size="12pt" officeooo:rsid="0188b3c0" style:font-size-asian="12pt" style:font-size-complex="12pt"/>
    </style:style>
    <style:style style:name="T22" style:family="text">
      <style:text-properties fo:color="#ffff00" fo:font-size="12pt" officeooo:rsid="018d5fb5" style:font-size-asian="12pt" style:font-size-complex="12pt"/>
    </style:style>
    <style:style style:name="T23" style:family="text">
      <style:text-properties fo:color="#ffff00" fo:font-size="12pt" officeooo:rsid="018f99cf" style:font-size-asian="12pt" style:font-size-complex="12pt"/>
    </style:style>
    <style:style style:name="T24" style:family="text">
      <style:text-properties fo:color="#ffff00" style:font-name="FreeMono" fo:font-style="normal" fo:font-weight="bold" officeooo:rsid="018f99cf" style:font-style-asian="normal" style:font-weight-asian="bold" style:font-style-complex="normal" style:font-weight-complex="bold"/>
    </style:style>
    <style:style style:name="T25" style:family="text">
      <style:text-properties fo:color="#ffff00" style:font-name="FreeMono" fo:font-size="10pt" fo:font-style="normal" fo:font-weight="bold" officeooo:rsid="018f99cf" style:font-size-asian="10pt" style:font-style-asian="normal" style:font-weight-asian="bold" style:font-size-complex="10pt" style:font-style-complex="normal" style:font-weight-complex="bold"/>
    </style:style>
    <style:style style:name="T26" style:family="text">
      <style:text-properties fo:color="#ffff00" style:font-name="FreeMono" fo:font-size="10pt" fo:font-style="normal" fo:font-weight="bold" officeooo:rsid="01a91407" style:font-size-asian="10pt" style:font-style-asian="normal" style:font-weight-asian="bold" style:font-size-complex="10pt" style:font-style-complex="normal" style:font-weight-complex="bold"/>
    </style:style>
    <style:style style:name="T27" style:family="text">
      <style:text-properties fo:color="#ffff00" fo:font-style="normal" fo:font-weight="bold" officeooo:rsid="01abfa6b" style:font-style-asian="normal" style:font-weight-asian="bold" style:font-style-complex="normal" style:font-weight-complex="bold"/>
    </style:style>
    <style:style style:name="T28" style:family="text">
      <style:text-properties fo:font-size="12pt" fo:font-style="normal" fo:font-weight="bold" officeooo:rsid="01891767" style:font-size-asian="12pt" style:font-style-asian="normal" style:font-weight-asian="bold" style:font-size-complex="12pt" style:font-style-complex="normal" style:font-weight-complex="bold"/>
    </style:style>
    <style:style style:name="T29" style:family="text">
      <style:text-properties fo:font-size="12pt" fo:font-style="normal" fo:font-weight="bold" officeooo:rsid="01b2cbc2" style:font-size-asian="12pt" style:font-style-asian="normal" style:font-weight-asian="bold" style:font-size-complex="12pt" style:font-style-complex="normal" style:font-weight-complex="bold"/>
    </style:style>
    <style:style style:name="T30" style:family="text">
      <style:text-properties fo:font-size="12pt" fo:font-style="normal" fo:font-weight="normal" officeooo:rsid="01808634"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147498b"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18a3275"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18b9acb"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1b2cbc2" style:font-size-asian="12pt" style:font-style-asian="normal" style:font-weight-asian="normal" style:font-size-complex="12pt" style:font-style-complex="normal" style:font-weight-complex="normal"/>
    </style:style>
    <style:style style:name="T35" style:family="text">
      <style:text-properties fo:font-size="12pt" fo:font-style="normal" officeooo:rsid="001c12f4" style:font-size-asian="12pt" style:font-style-asian="normal" style:font-size-complex="12pt" style:font-style-complex="normal"/>
    </style:style>
    <style:style style:name="T36" style:family="text">
      <style:text-properties fo:font-size="12pt" fo:font-style="normal" officeooo:rsid="008dab97" style:font-size-asian="12pt" style:font-style-asian="normal" style:font-size-complex="12pt" style:font-style-complex="normal"/>
    </style:style>
    <style:style style:name="T37" style:family="text">
      <style:text-properties fo:font-size="12pt" fo:font-style="normal" officeooo:rsid="01891767" style:font-size-asian="12pt" style:font-style-asian="normal" style:font-size-complex="12pt" style:font-style-complex="normal"/>
    </style:style>
    <style:style style:name="T38" style:family="text">
      <style:text-properties fo:font-size="12pt" style:font-size-asian="12pt" style:font-size-complex="12pt"/>
    </style:style>
    <style:style style:name="T39" style:family="text">
      <style:text-properties fo:font-size="12pt" officeooo:rsid="00490635" style:font-size-asian="12pt" style:font-size-complex="12pt"/>
    </style:style>
    <style:style style:name="T40" style:family="text">
      <style:text-properties fo:font-size="12pt" officeooo:rsid="005396c3" style:font-size-asian="12pt" style:font-size-complex="12pt"/>
    </style:style>
    <style:style style:name="T41" style:family="text">
      <style:text-properties fo:font-size="12pt" officeooo:rsid="018f99cf" style:font-size-asian="12pt" style:font-size-complex="12pt"/>
    </style:style>
    <style:style style:name="T42" style:family="text">
      <style:text-properties fo:font-size="16pt" fo:font-style="normal" officeooo:rsid="001c12f4" style:font-size-asian="16pt" style:font-style-asian="normal" style:font-size-complex="16pt" style:font-style-complex="normal"/>
    </style:style>
    <style:style style:name="T43" style:family="text">
      <style:text-properties fo:font-size="16pt" fo:font-style="normal" officeooo:rsid="0045d3cf" style:font-size-asian="16pt" style:font-style-asian="normal" style:font-size-complex="16pt" style:font-style-complex="normal"/>
    </style:style>
    <style:style style:name="T44" style:family="text">
      <style:text-properties fo:font-size="16pt" fo:font-style="normal" officeooo:rsid="015c6a5d" style:font-size-asian="16pt" style:font-style-asian="normal" style:font-size-complex="16pt" style:font-style-complex="normal"/>
    </style:style>
    <style:style style:name="T45" style:family="text">
      <style:text-properties fo:font-size="16pt" fo:font-style="normal" officeooo:rsid="01891767" style:font-size-asian="16pt" style:font-style-asian="normal" style:font-size-complex="16pt" style:font-style-complex="normal"/>
    </style:style>
    <style:style style:name="T46" style:family="text">
      <style:text-properties fo:font-size="16pt" officeooo:rsid="001c12f4" style:font-size-asian="16pt" style:font-size-complex="16pt"/>
    </style:style>
    <style:style style:name="T47" style:family="text">
      <style:text-properties style:font-name="Futura Std Light1" fo:font-size="12pt" fo:font-style="normal" fo:font-weight="bold" officeooo:rsid="02ac4a09" style:font-size-asian="12pt" style:font-style-asian="normal" style:font-weight-asian="bold" style:font-size-complex="12pt" style:font-style-complex="normal" style:font-weight-complex="bold"/>
    </style:style>
    <style:style style:name="T48" style:family="text">
      <style:text-properties style:font-name="Futura Std Light1" fo:font-size="12pt" fo:font-style="normal" fo:font-weight="bold" officeooo:rsid="02a9f553" style:font-size-asian="12pt" style:font-style-asian="normal" style:font-weight-asian="bold" style:font-size-complex="12pt" style:font-style-complex="normal" style:font-weight-complex="bold"/>
    </style:style>
    <style:style style:name="T49" style:family="text">
      <style:text-properties style:font-name="Futura Std Light1" fo:font-size="12pt" fo:font-style="normal" fo:font-weight="bold" officeooo:rsid="01881edb" style:font-size-asian="12pt" style:font-style-asian="normal" style:font-weight-asian="bold" style:font-size-complex="12pt" style:font-style-complex="normal" style:font-weight-complex="bold"/>
    </style:style>
    <style:style style:name="T50" style:family="text">
      <style:text-properties style:font-name="Futura Std Light1" fo:font-size="12pt" fo:font-style="normal" fo:font-weight="normal" officeooo:rsid="00356139" style:font-size-asian="12pt" style:font-style-asian="normal" style:font-weight-asian="normal" style:font-size-complex="12pt" style:font-style-complex="normal" style:font-weight-complex="normal"/>
    </style:style>
    <style:style style:name="T51" style:family="text">
      <style:text-properties style:font-name="Futura Std Light1" fo:font-size="12pt" fo:font-style="normal" fo:font-weight="normal" officeooo:rsid="018b9acb" style:font-size-asian="12pt" style:font-style-asian="normal" style:font-weight-asian="normal" style:font-size-complex="12pt" style:font-style-complex="normal" style:font-weight-complex="normal"/>
    </style:style>
    <style:style style:name="T52" style:family="text">
      <style:text-properties style:font-name="Futura Std Light1" fo:font-size="16pt" fo:font-style="normal" officeooo:rsid="001c12f4" style:font-size-asian="16pt" style:font-style-asian="normal" style:font-size-complex="16pt" style:font-style-complex="normal"/>
    </style:style>
    <style:style style:name="T53" style:family="text">
      <style:text-properties style:font-name="Futura Std Light1" fo:font-size="16pt" fo:font-style="normal" officeooo:rsid="0045d3cf" style:font-size-asian="16pt" style:font-style-asian="normal" style:font-size-complex="16pt" style:font-style-complex="normal"/>
    </style:style>
    <style:style style:name="T54" style:family="text">
      <style:text-properties style:font-name="Futura Std Light1" fo:font-size="16pt" fo:font-style="normal" officeooo:rsid="01891767" style:font-size-asian="16pt" style:font-style-asian="normal" style:font-size-complex="16pt" style:font-style-complex="normal"/>
    </style:style>
    <style:style style:name="T55" style:family="text">
      <style:text-properties style:font-name="Futura Std Light1" fo:font-size="16pt" fo:font-style="normal" officeooo:rsid="01a0b8fe" style:font-size-asian="16pt" style:font-style-asian="normal" style:font-size-complex="16pt" style:font-style-complex="normal"/>
    </style:style>
    <style:style style:name="T56" style:family="text">
      <style:text-properties style:font-name="Futura Std Light1" fo:font-size="18pt" fo:font-style="normal" fo:font-weight="normal" officeooo:rsid="0051862f" style:font-size-asian="18pt" style:font-style-asian="normal" style:font-weight-asian="normal" style:font-size-complex="18pt" style:font-style-complex="normal" style:font-weight-complex="normal"/>
    </style:style>
    <style:style style:name="T57" style:family="text">
      <style:text-properties style:font-name="Futura Std Light1" fo:font-size="18pt" fo:font-style="normal" fo:font-weight="normal" officeooo:rsid="001c12f4" style:font-size-asian="18pt" style:font-style-asian="normal" style:font-weight-asian="normal" style:font-size-complex="18pt" style:font-style-complex="normal" style:font-weight-complex="normal"/>
    </style:style>
    <style:style style:name="T58" style:family="text">
      <style:text-properties style:font-name="Futura Std Light1" fo:font-size="18pt" fo:font-style="normal" fo:font-weight="normal" officeooo:rsid="018a3275" style:font-size-asian="18pt" style:font-style-asian="normal" style:font-weight-asian="normal" style:font-size-complex="18pt" style:font-style-complex="normal" style:font-weight-complex="normal"/>
    </style:style>
    <style:style style:name="T59" style:family="text">
      <style:text-properties style:font-name="Futura Std Light1" fo:font-size="18pt" fo:font-style="normal" fo:font-weight="normal" officeooo:rsid="018b9acb" style:font-size-asian="18pt" style:font-style-asian="normal" style:font-weight-asian="normal" style:font-size-complex="18pt" style:font-style-complex="normal" style:font-weight-complex="normal"/>
    </style:style>
    <style:style style:name="T60" style:family="text">
      <style:text-properties style:font-name="Futura Std Light1" fo:font-size="18pt" fo:font-style="normal" fo:font-weight="normal" officeooo:rsid="018d5fb5" style:font-size-asian="18pt" style:font-style-asian="normal" style:font-weight-asian="normal" style:font-size-complex="18pt" style:font-style-complex="normal" style:font-weight-complex="normal"/>
    </style:style>
    <style:style style:name="T61" style:family="text">
      <style:text-properties style:font-name="Futura Std Light1" fo:font-size="18pt" fo:font-style="normal" fo:font-weight="normal" officeooo:rsid="018f282a" style:font-size-asian="18pt" style:font-style-asian="normal" style:font-weight-asian="normal" style:font-size-complex="18pt" style:font-style-complex="normal" style:font-weight-complex="normal"/>
    </style:style>
    <style:style style:name="T62" style:family="text">
      <style:text-properties style:font-name="Futura Std Light1" fo:font-size="18pt" fo:font-style="normal" fo:font-weight="normal" officeooo:rsid="01891767" style:font-size-asian="18pt" style:font-style-asian="normal" style:font-weight-asian="normal" style:font-size-complex="18pt" style:font-style-complex="normal" style:font-weight-complex="normal"/>
    </style:style>
    <style:style style:name="T63" style:family="text">
      <style:text-properties style:font-name="Futura Std Light1" fo:font-size="18pt" fo:font-style="normal" fo:font-weight="normal" officeooo:rsid="01a0b8fe" style:font-size-asian="18pt" style:font-style-asian="normal" style:font-weight-asian="normal" style:font-size-complex="18pt" style:font-style-complex="normal" style:font-weight-complex="normal"/>
    </style:style>
    <style:style style:name="T64" style:family="text">
      <style:text-properties style:font-name="Futura Std Light1" fo:font-size="18pt" fo:font-style="normal" fo:font-weight="normal" officeooo:rsid="01a7bc0d" style:font-size-asian="18pt" style:font-style-asian="normal" style:font-weight-asian="normal" style:font-size-complex="18pt" style:font-style-complex="normal" style:font-weight-complex="normal"/>
    </style:style>
    <style:style style:name="T65" style:family="text">
      <style:text-properties style:font-name="Futura Std Light1" fo:font-size="18pt" fo:font-style="normal" fo:font-weight="normal" officeooo:rsid="01b0f123" style:font-size-asian="18pt" style:font-style-asian="normal" style:font-weight-asian="normal" style:font-size-complex="18pt" style:font-style-complex="normal" style:font-weight-complex="normal"/>
    </style:style>
    <style:style style:name="T66" style:family="text">
      <style:text-properties style:font-name="Futura Std Light1" fo:font-size="18pt" fo:font-style="normal" officeooo:rsid="0051862f" style:font-size-asian="18pt" style:font-style-asian="normal" style:font-size-complex="18pt" style:font-style-complex="normal"/>
    </style:style>
    <style:style style:name="T67" style:family="text">
      <style:text-properties style:font-name="Futura Std Light1" fo:font-size="18pt" fo:font-style="normal" officeooo:rsid="001c12f4" style:font-size-asian="18pt" style:font-style-asian="normal" style:font-size-complex="18pt" style:font-style-complex="normal"/>
    </style:style>
    <style:style style:name="T68" style:family="text">
      <style:text-properties style:font-name="Futura Std Light1" fo:font-size="18pt" fo:font-style="normal" officeooo:rsid="01a0b8fe" style:font-size-asian="18pt" style:font-style-asian="normal" style:font-size-complex="18pt" style:font-style-complex="normal"/>
    </style:style>
    <style:style style:name="T69" style:family="text">
      <style:text-properties style:font-name="Mephisto™" fo:font-size="14pt" fo:font-style="normal" fo:font-weight="bold" officeooo:rsid="01881edb" style:font-size-asian="14pt" style:font-style-asian="normal" style:font-weight-asian="bold" style:font-size-complex="14pt" style:font-style-complex="normal" style:font-weight-complex="bold"/>
    </style:style>
    <style:style style:name="T70" style:family="text">
      <style:text-properties officeooo:rsid="01891767"/>
    </style:style>
    <style:style style:name="T71" style:family="text">
      <style:text-properties officeooo:rsid="018a3275"/>
    </style:style>
    <style:style style:name="T72" style:family="text">
      <style:text-properties style:font-name="sans-serif" fo:font-size="14.25pt" fo:font-style="normal" fo:font-weight="normal" officeooo:rsid="018b9acb" style:font-size-asian="12pt" style:font-style-asian="normal" style:font-weight-asian="normal" style:font-size-complex="12pt" style:font-style-complex="normal" style:font-weight-complex="normal"/>
    </style:style>
    <style:style style:name="T73" style:family="text">
      <style:text-properties style:font-name="Futura Std Light"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style:font-name="Futura Std Light" fo:font-size="12pt" fo:font-style="normal" fo:font-weight="normal" officeooo:rsid="002fb127" style:font-size-asian="12pt" style:font-style-asian="normal" style:font-weight-asian="normal" style:font-size-complex="12pt" style:font-style-complex="normal" style:font-weight-complex="normal"/>
    </style:style>
    <style:style style:name="T75" style:family="text">
      <style:text-properties style:font-name="Futura Std Light" fo:font-size="12pt" fo:font-style="normal" fo:font-weight="normal" officeooo:rsid="017c6c1c" style:font-size-asian="12pt" style:font-style-asian="normal" style:font-weight-asian="normal" style:font-size-complex="12pt" style:font-style-complex="normal" style:font-weight-complex="normal"/>
    </style:style>
    <style:style style:name="T76" style:family="text">
      <style:text-properties style:font-name="Futura Std Light" fo:font-size="12pt" fo:font-style="normal" fo:font-weight="normal" officeooo:rsid="018b9acb" style:font-size-asian="12pt" style:font-style-asian="normal" style:font-weight-asian="normal" style:font-size-complex="12pt" style:font-style-complex="normal" style:font-weight-complex="normal"/>
    </style:style>
    <style:style style:name="T77" style:family="text">
      <style:text-properties style:font-name="Futura Std Light" fo:font-size="12pt" fo:font-style="normal" fo:font-weight="normal" officeooo:rsid="018d5fb5" style:font-size-asian="12pt" style:font-style-asian="normal" style:font-weight-asian="normal" style:font-size-complex="12pt" style:font-style-complex="normal" style:font-weight-complex="normal"/>
    </style:style>
    <style:style style:name="T78" style:family="text">
      <style:text-properties style:font-name="Futura Std Light" fo:font-size="12pt" fo:font-style="normal" fo:font-weight="normal" officeooo:rsid="01967016" style:font-size-asian="12pt" style:font-style-asian="normal" style:font-weight-asian="normal" style:font-size-complex="12pt" style:font-style-complex="normal" style:font-weight-complex="normal"/>
    </style:style>
    <style:style style:name="T79" style:family="text">
      <style:text-properties style:font-name="Futura Std Light" fo:font-size="12pt" fo:font-style="normal" fo:font-weight="normal" officeooo:rsid="018f282a" style:font-size-asian="12pt" style:font-style-asian="normal" style:font-weight-asian="normal" style:font-size-complex="12pt" style:font-style-complex="normal" style:font-weight-complex="normal"/>
    </style:style>
    <style:style style:name="T80" style:family="text">
      <style:text-properties style:font-name="Futura Std Light" fo:font-size="12pt" fo:font-style="normal" fo:font-weight="normal" officeooo:rsid="01808634" style:font-size-asian="12pt" style:font-style-asian="normal" style:font-weight-asian="normal" style:font-size-complex="12pt" style:font-style-complex="normal" style:font-weight-complex="normal"/>
    </style:style>
    <style:style style:name="T81" style:family="text">
      <style:text-properties style:font-name="Futura Std Light" fo:font-size="12pt" fo:font-style="normal" fo:font-weight="normal" officeooo:rsid="01a7bc0d" style:font-size-asian="12pt" style:font-style-asian="normal" style:font-weight-asian="normal" style:font-size-complex="12pt" style:font-style-complex="normal" style:font-weight-complex="normal"/>
    </style:style>
    <style:style style:name="T82" style:family="text">
      <style:text-properties style:font-name="Futura Std Light" fo:font-size="12pt" fo:font-style="normal" fo:font-weight="normal" officeooo:rsid="01865db2" style:font-size-asian="12pt" style:font-style-asian="normal" style:font-weight-asian="normal" style:font-size-complex="12pt" style:font-style-complex="normal" style:font-weight-complex="normal"/>
    </style:style>
    <style:style style:name="T83" style:family="text">
      <style:text-properties style:font-name="Futura Std Light" fo:font-size="12pt" fo:font-style="normal" fo:font-weight="normal" officeooo:rsid="01abfa6b" style:font-size-asian="12pt" style:font-style-asian="normal" style:font-weight-asian="normal" style:font-size-complex="12pt" style:font-style-complex="normal" style:font-weight-complex="normal"/>
    </style:style>
    <style:style style:name="T84" style:family="text">
      <style:text-properties style:font-name="Futura Std Light" fo:font-size="12pt" fo:font-style="normal" fo:font-weight="normal" officeooo:rsid="01b0f123" style:font-size-asian="12pt" style:font-style-asian="normal" style:font-weight-asian="normal" style:font-size-complex="12pt" style:font-style-complex="normal" style:font-weight-complex="normal"/>
    </style:style>
    <style:style style:name="T85" style:family="text">
      <style:text-properties style:font-name="Futura Std Light" fo:font-size="12pt" fo:font-style="normal" fo:font-weight="normal" style:font-size-asian="10.5pt" style:font-style-asian="normal" style:font-weight-asian="normal" style:font-size-complex="12pt" style:font-style-complex="normal" style:font-weight-complex="normal"/>
    </style:style>
    <style:style style:name="T86" style:family="text">
      <style:text-properties style:font-name="Futura Std Light" fo:font-size="12pt" fo:font-style="normal" fo:font-weight="normal" officeooo:rsid="018f99cf" style:font-size-asian="10.5pt" style:font-style-asian="normal" style:font-weight-asian="normal" style:font-size-complex="12pt" style:font-style-complex="normal" style:font-weight-complex="normal"/>
    </style:style>
    <style:style style:name="T87" style:family="text">
      <style:text-properties style:font-name="Futura Std Light" fo:font-size="12pt" fo:font-style="normal" fo:font-weight="normal" officeooo:rsid="019934cf" style:font-size-asian="10.5pt" style:font-style-asian="normal" style:font-weight-asian="normal" style:font-size-complex="12pt" style:font-style-complex="normal" style:font-weight-complex="normal"/>
    </style:style>
    <style:style style:name="T88" style:family="text">
      <style:text-properties style:font-name="Futura Std Light" fo:font-size="12pt" fo:font-style="normal" fo:font-weight="normal" officeooo:rsid="019a7706" style:font-size-asian="10.5pt" style:font-style-asian="normal" style:font-weight-asian="normal" style:font-size-complex="12pt" style:font-style-complex="normal" style:font-weight-complex="normal"/>
    </style:style>
    <style:style style:name="T89" style:family="text">
      <style:text-properties style:font-name="Futura Std Light" fo:font-size="12pt" fo:font-style="normal" fo:font-weight="normal" officeooo:rsid="01a3d25f" style:font-size-asian="10.5pt" style:font-style-asian="normal" style:font-weight-asian="normal" style:font-size-complex="12pt" style:font-style-complex="normal" style:font-weight-complex="normal"/>
    </style:style>
    <style:style style:name="T90" style:family="text">
      <style:text-properties style:font-name="Futura Std Light" fo:font-size="12pt" fo:font-style="normal" fo:font-weight="normal" officeooo:rsid="01a5a1f8" style:font-size-asian="10.5pt" style:font-style-asian="normal" style:font-weight-asian="normal" style:font-size-complex="12pt" style:font-style-complex="normal" style:font-weight-complex="normal"/>
    </style:style>
    <style:style style:name="T91" style:family="text">
      <style:text-properties style:font-name="Futura Std Light" fo:font-size="12pt" fo:font-style="normal" fo:font-weight="normal" officeooo:rsid="01a7bc0d" style:font-size-asian="10.5pt" style:font-style-asian="normal" style:font-weight-asian="normal" style:font-size-complex="12pt" style:font-style-complex="normal" style:font-weight-complex="normal"/>
    </style:style>
    <style:style style:name="T92" style:family="text">
      <style:text-properties style:font-name="Futura Std Light" fo:font-size="12pt" fo:font-style="normal" fo:font-weight="normal" officeooo:rsid="01abfa6b" style:font-size-asian="10.5pt" style:font-style-asian="normal" style:font-weight-asian="normal" style:font-size-complex="12pt" style:font-style-complex="normal" style:font-weight-complex="normal"/>
    </style:style>
    <style:style style:name="T93" style:family="text">
      <style:text-properties style:font-name="Futura Std Light" fo:font-size="12pt" fo:font-style="normal" fo:font-weight="bold" officeooo:rsid="01a5a1f8" style:font-size-asian="10.5pt" style:font-style-asian="normal" style:font-weight-asian="bold" style:font-size-complex="12pt" style:font-style-complex="normal" style:font-weight-complex="bold"/>
    </style:style>
    <style:style style:name="T94" style:family="text">
      <style:text-properties style:font-name="Futura Std Light" fo:font-size="12pt" fo:font-style="normal" fo:font-weight="bold" officeooo:rsid="01abfa6b" style:font-size-asian="10.5pt" style:font-style-asian="normal" style:font-weight-asian="bold" style:font-size-complex="12pt" style:font-style-complex="normal" style:font-weight-complex="bold"/>
    </style:style>
    <style:style style:name="T95" style:family="text">
      <style:text-properties style:font-name="Futura Std Light" fo:font-size="12pt" fo:font-style="normal" fo:font-weight="bold" style:font-size-asian="12pt" style:font-style-asian="normal" style:font-weight-asian="bold" style:font-size-complex="12pt" style:font-style-complex="normal" style:font-weight-complex="bold"/>
    </style:style>
    <style:style style:name="T96" style:family="text">
      <style:text-properties style:font-name="Futura Std Light" fo:font-size="12pt" fo:font-style="normal" fo:font-weight="bold" officeooo:rsid="01b0f123" style:font-size-asian="12pt" style:font-style-asian="normal" style:font-weight-asian="bold" style:font-size-complex="12pt" style:font-style-complex="normal" style:font-weight-complex="bold"/>
    </style:style>
    <style:style style:name="T97" style:family="text">
      <style:text-properties style:font-name="Futura Std Light" fo:font-style="normal" fo:font-weight="normal" style:font-style-asian="normal" style:font-weight-asian="normal" style:font-style-complex="normal" style:font-weight-complex="normal"/>
    </style:style>
    <style:style style:name="T98" style:family="text">
      <style:text-properties style:font-name="Futura Std Light" fo:font-style="normal" fo:font-weight="normal" officeooo:rsid="018d5fb5" style:font-style-asian="normal" style:font-weight-asian="normal" style:font-style-complex="normal" style:font-weight-complex="normal"/>
    </style:style>
    <style:style style:name="T99" style:family="text">
      <style:text-properties style:font-name="Futura Std Light" fo:font-style="normal" fo:font-weight="normal" officeooo:rsid="018f282a" style:font-style-asian="normal" style:font-weight-asian="normal" style:font-style-complex="normal" style:font-weight-complex="normal"/>
    </style:style>
    <style:style style:name="T100" style:family="text">
      <style:text-properties style:font-name="Futura Std Light" fo:font-style="normal" fo:font-weight="normal" officeooo:rsid="018f99cf" style:font-style-asian="normal" style:font-weight-asian="normal" style:font-style-complex="normal" style:font-weight-complex="normal"/>
    </style:style>
    <style:style style:name="T101" style:family="text">
      <style:text-properties style:font-name="Futura Std Light" fo:font-style="normal" fo:font-weight="normal" officeooo:rsid="019149ab" style:font-style-asian="normal" style:font-weight-asian="normal" style:font-style-complex="normal" style:font-weight-complex="normal"/>
    </style:style>
    <style:style style:name="T102" style:family="text">
      <style:text-properties style:font-name="Futura Std Light" fo:font-style="normal" fo:font-weight="normal" officeooo:rsid="0192709d" style:font-style-asian="normal" style:font-weight-asian="normal" style:font-style-complex="normal" style:font-weight-complex="normal"/>
    </style:style>
    <style:style style:name="T103" style:family="text">
      <style:text-properties style:font-name="Futura Std Light" fo:font-style="normal" fo:font-weight="normal" officeooo:rsid="01929717" style:font-style-asian="normal" style:font-weight-asian="normal" style:font-style-complex="normal" style:font-weight-complex="normal"/>
    </style:style>
    <style:style style:name="T104" style:family="text">
      <style:text-properties style:font-name="Futura Std Light" fo:font-style="normal" fo:font-weight="normal" officeooo:rsid="01972c59" style:font-style-asian="normal" style:font-weight-asian="normal" style:font-style-complex="normal" style:font-weight-complex="normal"/>
    </style:style>
    <style:style style:name="T105" style:family="text">
      <style:text-properties style:font-name="Futura Std Light" fo:font-style="normal" fo:font-weight="normal" officeooo:rsid="019c6a85" style:font-style-asian="normal" style:font-weight-asian="normal" style:font-style-complex="normal" style:font-weight-complex="normal"/>
    </style:style>
    <style:style style:name="T106" style:family="text">
      <style:text-properties style:font-name="Futura Std Light" fo:font-style="normal" fo:font-weight="normal" officeooo:rsid="019e5586" style:font-style-asian="normal" style:font-weight-asian="normal" style:font-style-complex="normal" style:font-weight-complex="normal"/>
    </style:style>
    <style:style style:name="T107" style:family="text">
      <style:text-properties style:font-name="Futura Std Light" fo:font-style="normal" fo:font-weight="normal" officeooo:rsid="019f2a5a" style:font-style-asian="normal" style:font-weight-asian="normal" style:font-style-complex="normal" style:font-weight-complex="normal"/>
    </style:style>
    <style:style style:name="T108" style:family="text">
      <style:text-properties style:font-name="Futura Std Light" fo:font-style="normal" fo:font-weight="normal" officeooo:rsid="01a3d25f" style:font-style-asian="normal" style:font-weight-asian="normal" style:font-style-complex="normal" style:font-weight-complex="normal"/>
    </style:style>
    <style:style style:name="T109" style:family="text">
      <style:text-properties style:font-name="Futura Std Light" fo:font-style="normal" fo:font-weight="normal" officeooo:rsid="01865db2" style:font-size-asian="12pt" style:font-style-asian="normal" style:font-weight-asian="normal" style:font-style-complex="normal" style:font-weight-complex="normal"/>
    </style:style>
    <style:style style:name="T110" style:family="text">
      <style:text-properties style:font-name="Futura Std Light" fo:font-style="normal" fo:font-weight="normal" officeooo:rsid="018d5fb5" style:font-size-asian="12pt" style:font-style-asian="normal" style:font-weight-asian="normal" style:font-style-complex="normal" style:font-weight-complex="normal"/>
    </style:style>
    <style:style style:name="T111" style:family="text">
      <style:text-properties style:font-name="Futura Std Light" fo:font-style="normal" fo:font-weight="normal" officeooo:rsid="01808634" style:font-size-asian="12pt" style:font-style-asian="normal" style:font-weight-asian="normal" style:font-style-complex="normal" style:font-weight-complex="normal"/>
    </style:style>
    <style:style style:name="T112" style:family="text">
      <style:text-properties style:font-name="Futura Std Light" fo:font-style="normal" fo:font-weight="normal" officeooo:rsid="018f282a" style:font-size-asian="12pt" style:font-style-asian="normal" style:font-weight-asian="normal" style:font-style-complex="normal" style:font-weight-complex="normal"/>
    </style:style>
    <style:style style:name="T113" style:family="text">
      <style:text-properties style:font-name="Futura Std Light" fo:font-style="normal" style:font-style-asian="normal" style:font-style-complex="normal"/>
    </style:style>
    <style:style style:name="T114" style:family="text">
      <style:text-properties style:font-name="Futura Std Light" fo:font-style="normal" officeooo:rsid="01865db2" style:font-style-asian="normal" style:font-style-complex="normal"/>
    </style:style>
    <style:style style:name="T115" style:family="text">
      <style:text-properties style:font-name="Futura Std Light" fo:font-style="normal" fo:font-weight="bold" officeooo:rsid="01929717" style:font-style-asian="normal" style:font-weight-asian="bold" style:font-style-complex="normal" style:font-weight-complex="bold"/>
    </style:style>
    <style:style style:name="T116" style:family="text">
      <style:text-properties style:font-name="Futura Std Light" fo:font-style="normal" fo:font-weight="bold" officeooo:rsid="0192709d" style:font-style-asian="normal" style:font-weight-asian="bold" style:font-style-complex="normal" style:font-weight-complex="bold"/>
    </style:style>
    <style:style style:name="T117" style:family="text">
      <style:text-properties style:font-name="Futura Std Light" fo:font-style="normal" fo:font-weight="bold" officeooo:rsid="019149ab" style:font-style-asian="normal" style:font-weight-asian="bold" style:font-style-complex="normal" style:font-weight-complex="bold"/>
    </style:style>
    <style:style style:name="T118" style:family="text">
      <style:text-properties style:font-name="Futura Std Light" fo:font-style="normal" fo:font-weight="bold" officeooo:rsid="019c6a85" style:font-style-asian="normal" style:font-weight-asian="bold" style:font-style-complex="normal" style:font-weight-complex="bold"/>
    </style:style>
    <style:style style:name="T119" style:family="text">
      <style:text-properties style:font-name="Futura Std Light" fo:font-style="normal" fo:font-weight="bold" officeooo:rsid="01972c59" style:font-style-asian="normal" style:font-weight-asian="bold" style:font-style-complex="normal" style:font-weight-complex="bold"/>
    </style:style>
    <style:style style:name="T120" style:family="text">
      <style:text-properties style:font-name="Futura Std Light" fo:font-style="normal" fo:font-weight="bold" officeooo:rsid="018d5fb5" style:font-size-asian="12pt" style:font-style-asian="normal" style:font-weight-asian="bold" style:font-style-complex="normal" style:font-weight-complex="bold"/>
    </style:style>
    <style:style style:name="T121" style:family="text">
      <style:text-properties fo:color="#006600" fo:font-size="12pt" officeooo:rsid="009388c8" style:font-size-asian="12pt" style:font-size-complex="12pt"/>
    </style:style>
    <style:style style:name="T122" style:family="text">
      <style:text-properties fo:color="#006600" fo:font-size="12pt" officeooo:rsid="018d5fb5" style:font-size-asian="12pt" style:font-size-complex="12pt"/>
    </style:style>
    <style:style style:name="T123" style:family="text">
      <style:text-properties fo:color="#6666ff" fo:font-size="12pt" officeooo:rsid="018d5fb5" style:font-size-asian="12pt" style:font-size-complex="12pt"/>
    </style:style>
    <style:style style:name="T124" style:family="text">
      <style:text-properties fo:color="#ff8000" fo:font-size="12pt" officeooo:rsid="018f99cf" style:font-size-asian="12pt" style:font-size-complex="12pt"/>
    </style:style>
    <style:style style:name="T125" style:family="text">
      <style:text-properties fo:color="#81d41a" fo:font-size="12pt" officeooo:rsid="018f99cf" style:font-size-asian="12pt" style:font-size-complex="12pt"/>
    </style:style>
    <style:style style:name="T126" style:family="text">
      <style:text-properties officeooo:rsid="01967016"/>
    </style:style>
    <style:style style:name="T127" style:family="text">
      <style:text-properties officeooo:rsid="019c1c9f"/>
    </style:style>
    <style:style style:name="T128" style:family="text">
      <style:text-properties fo:color="#999999"/>
    </style:style>
    <style:style style:name="T129" style:family="text">
      <style:text-properties fo:color="#999999" style:font-name="Mephisto™" fo:font-size="14pt" officeooo:rsid="01881edb" style:font-size-asian="14pt" style:font-size-complex="14pt"/>
    </style:style>
    <style:style style:name="T130" style:family="text">
      <style:text-properties fo:color="#999999" style:font-name="Mephisto™" fo:font-size="14pt" fo:font-style="normal" fo:font-weight="bold" officeooo:rsid="01881edb" style:font-size-asian="14pt" style:font-style-asian="normal" style:font-weight-asian="bold" style:font-size-complex="14pt" style:font-style-complex="normal" style:font-weight-complex="bold"/>
    </style:style>
    <style:style style:name="T131" style:family="text">
      <style:text-properties fo:color="#999999" style:font-name="Futura Std Light" officeooo:rsid="018f282a" style:font-size-asian="12pt"/>
    </style:style>
    <style:style style:name="T132" style:family="text">
      <style:text-properties officeooo:rsid="01a0b8fe"/>
    </style:style>
    <style:style style:name="T133" style:family="text">
      <style:text-properties fo:color="#00fffd" fo:font-size="12pt" style:font-size-asian="12pt" style:font-size-complex="12pt"/>
    </style:style>
    <style:style style:name="T134" style:family="text">
      <style:text-properties fo:color="#00fffd" style:font-name="FreeMono" fo:font-style="normal" fo:font-weight="bold" officeooo:rsid="018f99cf" style:font-style-asian="normal" style:font-weight-asian="bold" style:font-style-complex="normal" style:font-weight-complex="bold"/>
    </style:style>
    <style:style style:name="T135" style:family="text">
      <style:text-properties fo:color="#00fffd" fo:font-style="normal" fo:font-weight="bold" officeooo:rsid="01abfa6b" style:font-style-asian="normal" style:font-weight-asian="bold" style:font-style-complex="normal" style:font-weight-complex="bold"/>
    </style:style>
    <style:style style:name="T136" style:family="text">
      <style:text-properties fo:color="#00fffd" fo:font-style="normal" fo:font-weight="bold" officeooo:rsid="01adf60e" style:font-style-asian="normal" style:font-weight-asian="bold" style:font-style-complex="normal" style:font-weight-complex="bold"/>
    </style:style>
    <style:style style:name="T137" style:family="text">
      <style:text-properties officeooo:rsid="01a5a1f8"/>
    </style:style>
    <style:style style:name="T138" style:family="text">
      <style:text-properties officeooo:rsid="01a7bc0d" style:font-size-asian="10.5pt"/>
    </style:style>
    <style:style style:name="T139" style:family="text">
      <style:text-properties officeooo:rsid="01aa2800" style:font-size-asian="10.5pt"/>
    </style:style>
    <style:style style:name="T140" style:family="text">
      <style:text-properties fo:color="#069a2e" style:font-name="FreeMono" fo:font-style="normal" fo:font-weight="bold" officeooo:rsid="018f99cf" style:font-style-asian="normal" style:font-weight-asian="bold" style:font-style-complex="normal" style:font-weight-complex="bold"/>
    </style:style>
    <style:style style:name="T141" style:family="text">
      <style:text-properties fo:color="#069a2e" style:font-name="FreeMono" fo:font-style="normal" fo:font-weight="bold" officeooo:rsid="01a7bc0d" style:font-style-asian="normal" style:font-weight-asian="bold" style:font-style-complex="normal" style:font-weight-complex="bold"/>
    </style:style>
    <style:style style:name="T142" style:family="text">
      <style:text-properties fo:color="#069a2e" style:font-name="FreeMono" fo:font-size="10pt" fo:font-style="normal" fo:font-weight="bold" officeooo:rsid="018f99cf" style:font-size-asian="10pt" style:font-style-asian="normal" style:font-weight-asian="bold" style:font-size-complex="10pt" style:font-style-complex="normal" style:font-weight-complex="bold"/>
    </style:style>
    <style:style style:name="T143" style:family="text">
      <style:text-properties fo:color="#069a2e" fo:font-style="normal" fo:font-weight="bold" officeooo:rsid="01abfa6b" style:font-style-asian="normal" style:font-weight-asian="bold" style:font-style-complex="normal" style:font-weight-complex="bold"/>
    </style:style>
    <style:style style:name="T144" style:family="text">
      <style:text-properties fo:color="#5983b0" style:font-name="FreeMono" fo:font-style="normal" fo:font-weight="bold" officeooo:rsid="018f99cf" style:font-style-asian="normal" style:font-weight-asian="bold" style:font-style-complex="normal" style:font-weight-complex="bold"/>
    </style:style>
    <style:style style:name="T145" style:family="text">
      <style:text-properties fo:color="#5983b0" fo:font-style="normal" fo:font-weight="bold" officeooo:rsid="01abfa6b" style:font-style-asian="normal" style:font-weight-asian="bold" style:font-style-complex="normal" style:font-weight-complex="bold"/>
    </style:style>
    <style:style style:name="T146" style:family="text">
      <style:text-properties fo:color="#780373" style:font-name="FreeMono" fo:font-style="normal" fo:font-weight="bold" officeooo:rsid="01a7bc0d" style:font-style-asian="normal" style:font-weight-asian="bold" style:font-style-complex="normal" style:font-weight-complex="bold"/>
    </style:style>
    <style:style style:name="T147" style:family="text">
      <style:text-properties fo:color="#780373" style:font-name="FreeMono" fo:font-style="normal" fo:font-weight="bold" officeooo:rsid="018f99cf" style:font-style-asian="normal" style:font-weight-asian="bold" style:font-style-complex="normal" style:font-weight-complex="bold"/>
    </style:style>
    <style:style style:name="T148" style:family="text">
      <style:text-properties fo:color="#780373" style:font-name="FreeMono" fo:font-size="10pt" fo:font-style="normal" fo:font-weight="bold" officeooo:rsid="01a7bc0d" style:font-size-asian="10pt" style:font-style-asian="normal" style:font-weight-asian="bold" style:font-size-complex="10pt" style:font-style-complex="normal" style:font-weight-complex="bold"/>
    </style:style>
    <style:style style:name="T149" style:family="text">
      <style:text-properties fo:color="#780373" fo:font-style="normal" fo:font-weight="bold" officeooo:rsid="01abfa6b" style:font-style-asian="normal" style:font-weight-asian="bold" style:font-style-complex="normal" style:font-weight-complex="bold"/>
    </style:style>
    <style:style style:name="T150" style:family="text">
      <style:text-properties fo:color="#000000" style:text-outline="false" style:font-name="Futura Std Light" fo:font-size="13pt" fo:font-weight="bold" style:font-size-asian="13pt" style:font-weight-asian="bold" style:font-size-complex="13pt" style:font-weight-complex="bold"/>
    </style:style>
    <style:style style:name="fr1" style:family="graphic" style:parent-style-name="Frame">
      <style:graphic-properties style:vertical-pos="from-top" style:vertical-rel="paragraph" style:horizontal-pos="from-left" style:horizontal-rel="paragraph" fo:background-color="#000000" style:background-transparency="0%" draw:fill="solid" draw:fill-color="#000000" draw:opacity="100%" draw:fill-image-width="0cm" draw:fill-image-height="0cm" fo:padding="0cm" fo:border="none" style:shadow="none" draw:shadow-opacity="100%"/>
    </style:style>
    <style:style style:name="fr2" style:family="graphic" style:parent-style-name="Frame">
      <style:graphic-properties style:vertical-pos="from-top" style:vertical-rel="paragraph" style:horizontal-pos="from-left" style:horizontal-rel="paragraph" fo:background-color="#ff3333" style:background-transparency="0%" draw:fill="solid" draw:fill-color="#ff3333" draw:opacity="100%" draw:fill-image-width="0cm" draw:fill-image-height="0cm"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5" draw:name="Image1" text:anchor-type="paragraph" svg:x="-2cm" svg:y="-3.512cm" svg:width="10.673cm" svg:height="10.321cm" draw:z-index="14"><draw:image xlink:href="Pictures/1000020100001B240000190598DC440914355D9B.png" xlink:type="simple" xlink:show="embed" xlink:actuate="onLoad" loext:mime-type="image/png"/></draw:frame></text:p>
      <text:p text:style-name="P3"><draw:frame draw:style-name="fr3" draw:name="Image5" text:anchor-type="char" svg:x="9.409cm" svg:y="0.356cm" svg:width="7.606cm" svg:height="1.655cm" draw:z-index="22"><draw:image xlink:href="Pictures/100002010000081C000001C3A531001A8546C411.png" xlink:type="simple" xlink:show="embed" xlink:actuate="onLoad" loext:mime-type="image/png"/></draw:frame></text:p>
      <text:p text:style-name="P3"/>
      <text:p text:style-name="P3"/>
      <text:p text:style-name="P3"><draw:frame text:anchor-type="paragraph" draw:z-index="15" draw:name="Shape1" draw:style-name="gr1" draw:text-style-name="P155" svg:width="7.891cm" svg:height="1.133cm" svg:x="9.292cm" svg:y="0.312cm"><draw:text-box><text:p text:style-name="P154"><text:span text:style-name="T150">Kind Of Advanced Language Assistant</text:span></text:p></draw:text-box></draw:frame></text:p>
      <text:p text:style-name="P3"/>
      <text:p text:style-name="P3"/>
      <text:p text:style-name="P3"/>
      <text:p text:style-name="P29"/>
      <text:p text:style-name="P3"/>
      <text:p text:style-name="P3"/>
      <text:p text:style-name="P3"/>
      <text:p text:style-name="P3"/>
      <text:p text:style-name="P3"/>
      <text:p text:style-name="P3"/>
      <text:p text:style-name="P3"/>
      <text:p text:style-name="P3"/>
      <text:p text:style-name="P4"/>
      <text:p text:style-name="P74"><text:span text:style-name="T1">RED</text:span><text:span text:style-name="T128">SPICE</text:span></text:p>
      <text:p text:style-name="P4"/>
      <text:p text:style-name="P57"><text:span text:style-name="T13">C</text:span>e projet consiste à réaliser un simulateur d’électronique numérique en C++.</text:p>
      <text:p text:style-name="P57">Il paraît que c’est difficile.</text:p>
      <text:p text:style-name="P57"/>
      <text:p text:style-name="P57">Mais en fait, oui.</text:p>
      <text:p text:style-name="P4"/>
      <text:p text:style-name="P4"/>
      <text:p text:style-name="P48"><text:span text:style-name="T47">- </text:span><text:span text:style-name="T49">KOALAB</text:span><text:span text:style-name="T48"> -</text:span></text:p>
      <text:p text:style-name="P30"/>
      <text:p text:style-name="P47"/>
      <text:p text:style-name="P32"/>
      <text:p text:style-name="P32"/>
      <text:p text:style-name="P32"/>
      <text:p text:style-name="P32"/>
      <text:p text:style-name="P32"/>
      <text:p text:style-name="P32"><draw:frame draw:style-name="fr3" draw:name="Image6" text:anchor-type="char" svg:x="14.628cm" svg:y="0.395cm" svg:width="2.258cm" svg:height="2.258cm" draw:z-index="23"><draw:image xlink:href="Pictures/10000201000000A0000000A0B46C84CF58B59A48.png" xlink:type="simple" xlink:show="embed" xlink:actuate="onLoad" loext:mime-type="image/png"/></draw:frame></text:p>
      <text:p text:style-name="P32"/>
      <text:p text:style-name="P32"/>
      <text:p text:style-name="P32"/>
      <text:p text:style-name="P62"><text:span text:style-name="T132">This document is stricltl personnal and must not be diffused.</text:span></text:p>
      <text:p text:style-name="P73">INDEX</text:p>
      <text:p text:style-name="P6"/>
      <text:p text:style-name="P6"/>
      <text:p text:style-name="P6"/>
      <text:p text:style-name="P36"><text:span text:style-name="T19"><text:tab/>0</text:span>1 – <text:span text:style-name="T70">Preliminary</text:span></text:p>
      <text:p text:style-name="P56"><text:span text:style-name="T52"><text:tab/></text:span><text:span text:style-name="T53">0</text:span><text:span text:style-name="T54">2</text:span><text:span text:style-name="T52"> – </text:span><text:span text:style-name="T55">Build</text:span><text:span text:style-name="T54"> method</text:span></text:p>
      <text:p text:style-name="P35"/>
      <text:p text:style-name="P38"><text:span text:style-name="T46"><text:tab/></text:span><text:span text:style-name="T43">0</text:span><text:span text:style-name="T45">3</text:span><text:span text:style-name="T44"> – </text:span><text:span text:style-name="T45">Digital electronic</text:span></text:p>
      <text:p text:style-name="P39"><text:span text:style-name="T42"><text:tab/></text:span><text:span text:style-name="T43">0</text:span><text:span text:style-name="T45">4</text:span><text:span text:style-name="T44"> – </text:span><text:span text:style-name="T45">Chipset</text:span></text:p>
      <text:p text:style-name="P40"><text:span text:style-name="T42"><text:tab/></text:span><text:span text:style-name="T43">0</text:span><text:span text:style-name="T45">5</text:span><text:span text:style-name="T44"> – </text:span><text:span text:style-name="T45">Undefined states</text:span></text:p>
      <text:p text:style-name="P42"><text:span text:style-name="T42"><text:tab/></text:span><text:span text:style-name="T43">0</text:span><text:span text:style-name="T45">6</text:span><text:span text:style-name="T44"> – </text:span><text:span text:style-name="T45">The project</text:span></text:p>
      <text:p text:style-name="P43"><text:span text:style-name="T42"><text:tab/></text:span><text:span text:style-name="T43">0</text:span><text:span text:style-name="T45">7</text:span><text:span text:style-name="T44"> – </text:span><text:span text:style-name="T45">Technical considerations</text:span></text:p>
      <text:p text:style-name="P43"><text:span text:style-name="T42"><text:tab/></text:span><text:span text:style-name="T43">0</text:span><text:span text:style-name="T45">8</text:span><text:span text:style-name="T44"> – </text:span><text:span text:style-name="T45">Bonus</text:span></text:p>
      <text:p text:style-name="P43"><text:span text:style-name="T42"><text:tab/></text:span><text:span text:style-name="T43">0</text:span><text:span text:style-name="T45">9</text:span><text:span text:style-name="T44"> – </text:span><text:span text:style-name="T45">Instructions</text:span></text:p>
      <text:p text:style-name="P75"/>
      <text:p text:style-name="P150"><text:span text:style-name="T66">0</text:span><text:span text:style-name="T67">1 – </text:span><text:span text:style-name="T68">Preliminary</text:span></text:p>
      <text:p text:style-name="P7"/>
      <text:p text:style-name="P12"/>
      <text:p text:style-name="P12"/>
      <text:p text:style-name="P44"><text:span text:style-name="T35"><text:tab/>You must deliv</text:span><text:span text:style-name="T36">er your work through</text:span><text:span text:style-name="T37">t the software forge. Your repository name will be</text:span><text:span text:style-name="T28"> redspice</text:span><text:span text:style-name="T37">.</text:span></text:p>
      <text:p text:style-name="P15"><draw:frame draw:style-name="fr2" draw:name="Cadre5" text:anchor-type="paragraph" svg:x="0.85cm" svg:y="0.342cm" svg:width="15.436cm" draw:z-index="17"><draw:text-box fo:min-height="2.032cm"><text:p text:style-name="P50"/><text:p text:style-name="P51">If you make a mistake and deliver your work in another repository, the pickup system will not be able to find it and so you will ne be evaluated.</text:p><text:p text:style-name="P49"/></draw:text-box></draw:frame></text:p>
      <text:p text:style-name="P11"/>
      <text:p text:style-name="P11"/>
      <text:p text:style-name="P11"/>
      <text:p text:style-name="P11"/>
      <text:p text:style-name="P10"><text:tab/><text:tab/><text:span text:style-name="T70">You </text:span><text:span text:style-name="T71">will work in team composed of 3 people. You can of course talk with other teams but your team </text:span><text:span text:style-name="T15">must</text:span><text:span text:style-name="T18"> be author of your code. Use another team code is </text:span><text:span text:style-name="T15">cheating</text:span><text:span text:style-name="T18">. And cheating remove all your medals. Cheat checking is automatic so you </text:span><text:span text:style-name="T15">cannot</text:span><text:span text:style-name="T18"> escape it.</text:span></text:p>
      <text:p text:style-name="P41"/>
      <text:p text:style-name="P13">_________________________________________________</text:p>
      <text:p text:style-name="P9"/>
      <text:p text:style-name="P9"><text:tab/><text:span text:style-name="T71">Your delivery </text:span><text:span text:style-name="T15">must</text:span><text:span text:style-name="T71"> respect the following rules :</text:span></text:p>
      <text:p text:style-name="P9"/>
      <text:p text:style-name="P14"><text:tab/>- I<text:span text:style-name="T71">t must not contain any kind of object file (*.o)</text:span></text:p>
      <text:p text:style-name="P14"><text:span text:style-name="T17"><text:tab/>- </text:span><text:span text:style-name="T18">It must not contain any buffer file (*~, #*#)</text:span></text:p>
      <text:p text:style-name="P22"><text:tab/>- <text:span text:style-name="T71">It must not contain your final product.</text:span></text:p>
      <text:p text:style-name="P22"/>
      <text:p text:style-name="P31"><draw:frame draw:style-name="fr2" draw:name="Frame3" text:anchor-type="paragraph" svg:x="0.85cm" svg:y="0.342cm" svg:width="15.436cm" draw:z-index="16"><draw:text-box fo:min-height="1.404cm"><text:p text:style-name="P50"/><text:p text:style-name="P51">The presence of a forbidden file will stop the evaluation.</text:p></draw:text-box></draw:frame></text:p>
      <text:p text:style-name="P33"/>
      <text:p text:style-name="P33"/>
      <text:p text:style-name="P33"/>
      <text:p text:style-name="P24"/>
      <text:p text:style-name="P17"/>
      <text:p text:style-name="P17"/>
      <text:p text:style-name="P17"/>
      <text:p text:style-name="P17"/>
      <text:p text:style-name="P17"/>
      <text:p text:style-name="P17"/>
      <text:p text:style-name="P17"/>
      <text:p text:style-name="P17"/>
      <text:p text:style-name="P17"/>
      <text:p text:style-name="P150"><text:span text:style-name="T50"><text:s text:c="5"/></text:span><text:span text:style-name="T56">0</text:span><text:span text:style-name="T62">2</text:span><text:span text:style-name="T57"> – </text:span><text:span text:style-name="T63">Build method</text:span></text:p>
      <text:p text:style-name="P17"/>
      <text:p text:style-name="P23"/>
      <text:p text:style-name="P23"/>
      <text:p text:style-name="P44"><text:span text:style-name="T31"><text:tab/></text:span><text:span text:style-name="T32">You must provide a Makefile to compile your whole project. You will provide a Makefile for each component. You will provide a Makefile for the simulator itself.</text:span></text:p>
      <text:p text:style-name="P44"><text:span text:style-name="T32"/></text:p>
      <text:p text:style-name="P95"><text:span text:style-name="T32"><text:tab/></text:span><text:span text:style-name="T34">Your main program will be named </text:span><text:span text:style-name="T29">redspice</text:span><text:span text:style-name="T34">.</text:span></text:p>
      <text:p text:style-name="P95"><text:span text:style-name="T34"/></text:p>
      <text:p text:style-name="P95"><text:span text:style-name="T34"><text:tab/>Component files will be name </text:span><text:span text:style-name="T29">component_name.so.</text:span></text:p>
      <text:p text:style-name="P34"/>
      <text:p text:style-name="P34"/>
      <text:p text:style-name="P69"><text:span text:style-name="T50"><text:s text:c="3"/></text:span><text:span text:style-name="T56">0</text:span><text:span text:style-name="T58">3</text:span><text:span text:style-name="T57"> – </text:span><text:span text:style-name="T58">Digital Electronic</text:span></text:p>
      <text:p text:style-name="P5"/>
      <text:p text:style-name="P16"/>
      <text:p text:style-name="P8"/>
      <text:p text:style-name="P59"><text:span text:style-name="T74"><text:tab/></text:span><text:span text:style-name="T75">There is variety of programming languages, C, Lisp, Basic, APL, Intercal... They all have<text:line-break/>their specificities and may be efficient in different ways. They mainly rely on a compiler<text:line-break/>to work. This compiler will transform the code which is written in almost human lan-<text:line-break/>guage to a more primitive form.</text:span></text:p>
      <text:p text:style-name="P96"><text:line-break/><text:tab/>This primitive form is the assembly language if seen as its human readable form, or<text:line-break/>machine language if seen as the microprocessor sees it.</text:p>
      <text:p text:style-name="P96"><text:line-break/><text:tab/>The same way there is a variety of programming languages, there is a lot of assembly<text:line-break/>languages: at least one per processor family, sometimes one per processor, sometimes<text:line-break/>several per processor.</text:p>
      <text:p text:style-name="P96"><text:line-break/><text:tab/>Of course, knowing an assembly language for a microprocessor may not be enough to<text:line-break/>be efficient: a microprocessor is not a full machine. You may need to know how your<text:line-break/>machine works in order to create a usefull program in assembly: Which address for the<text:line-break/>graphic card? Which trap for this system call?</text:p>
      <text:p text:style-name="P96"><text:line-break/><text:tab/>Under assembly languages and machine languages, there is the hardware itself. The<text:line-break/>hardware is built with digital electronic components: chipsets. Chipsets are tiny little<text:line-break/>functions with inputs and outputs that can be linked together to create more powerful<text:line-break/>functions, exactly like with software functions.</text:p>
      <text:p text:style-name="P97"><text:line-break/><text:tab/>These functions are exclusively based on boolean logic. So it only gets and returns<text:line-break/>true or false values. In this project, you will have to create a graph. In this graph, nodes<text:line-break/>will be simulated digital electronic components, inputs or outputs.</text:p>
      <text:p text:style-name="P97"><text:line-break/><text:tab/>What does a chipset look like? Here is one:</text:p>
      <text:p text:style-name="P97"/>
      <text:p text:style-name="P96"/>
      <text:p text:style-name="P96"><draw:frame draw:style-name="fr4" draw:name="Image2" text:anchor-type="char" svg:width="5.925cm" svg:height="4.607cm" draw:z-index="18"><draw:image xlink:href="Pictures/100000000000030100000256D3F87BE8B22DA1AD.png" xlink:type="simple" xlink:show="embed" xlink:actuate="onLoad" loext:mime-type="image/png"/></draw:frame></text:p>
      <text:p text:style-name="P70"><text:span text:style-name="T56">0</text:span><text:span text:style-name="T59">4</text:span><text:span text:style-name="T57"> – </text:span><text:span text:style-name="T59">Chipset</text:span></text:p>
      <text:p text:style-name="P77"/>
      <text:p text:style-name="P77"/>
      <text:p text:style-name="P77"/>
      <text:p text:style-name="P45"><text:span text:style-name="T30"><text:tab/></text:span><text:span text:style-name="T33">Here is an example of what’s inside a simple chipsets : the 4081.</text:span></text:p>
      <text:p text:style-name="P82"/>
      <text:p text:style-name="P82"><draw:frame draw:style-name="fr3" draw:name="Image3" text:anchor-type="char" svg:x="5.487cm" svg:y="0.344cm" svg:width="4.972cm" svg:height="4.994cm" draw:z-index="19"><draw:image xlink:href="Pictures/10000201000000E8000000E9C5FF3DFFA399AECE.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60"><text:span text:style-name="T51"><text:tab/></text:span><text:span text:style-name="T72">T</text:span><text:span text:style-name="T76">he 4081 is a little box that contains four AND gates. An AND gate has two inputs<text:line-break/>(A and B) and one output (S). The 4081 features 14 connectors.</text:span></text:p>
      <text:p text:style-name="P98"><text:line-break/><text:tab/>- Pin 1 and pin 2 are inputs of one of the and gate, let’s say gate 1.</text:p>
      <text:p text:style-name="P98"><text:line-break/><text:tab/>- Pin 3 is the output of gate 1.</text:p>
      <text:p text:style-name="P98"><text:line-break/><text:tab/>- Pin 4 is the output of gate 2.</text:p>
      <text:p text:style-name="P98"><text:line-break/><text:tab/>- Pin 5 and 6 are input of the gate 2.</text:p>
      <text:p text:style-name="P98"><text:line-break/><text:tab/>- Pin 7 (VSS) is here for electrical purpose. We will ignore it in this project.</text:p>
      <text:p text:style-name="P98"><text:line-break/><text:tab/>- Pin 8 and 9 are inputs of gate 3.</text:p>
      <text:p text:style-name="P98"><text:line-break/><text:tab/>- Pin 10 is the output of gate 3.</text:p>
      <text:p text:style-name="P98"><text:line-break/><text:tab/>- Pin 11 is the output of gate 4.</text:p>
      <text:p text:style-name="P98"><text:line-break/><text:tab/>- Pin 12 and 13 are inputs of gate 4.</text:p>
      <text:p text:style-name="P98"><text:line-break/><text:tab/>- Pin 14 (VDD) is here for electrical purpose. We will ignore it in this project.</text:p>
      <text:p text:style-name="P98"/>
      <text:p text:style-name="P98"/>
      <text:p text:style-name="P98"/>
      <text:p text:style-name="P98"><text:soft-page-break/></text:p>
      <text:p text:style-name="P98"><text:tab/>Here is the AND gate « truth table » :</text:p>
      <text:p text:style-name="P98"/>
      <text:p text:style-name="P118">A B S</text:p>
      <text:p text:style-name="P117">0 0 0</text:p>
      <text:p text:style-name="P117">0 1 0</text:p>
      <text:p text:style-name="P117">1 0 0</text:p>
      <text:p text:style-name="P117">1 1 1</text:p>
      <text:p text:style-name="P108"/>
      <text:p text:style-name="P58"><text:span text:style-name="T97"><text:tab/></text:span><text:span text:style-name="T98">Note that this is absolutely equivalent to the following function :</text:span></text:p>
      <text:p text:style-name="P46"/>
      <text:p text:style-name="P20"><draw:frame draw:style-name="fr1" draw:name="Cadre1" text:anchor-type="paragraph" svg:x="0.85cm" svg:y="0.34cm" svg:width="15.436cm" draw:z-index="20"><draw:text-box fo:min-height="1.415cm"><text:p text:style-name="P52"/><text:p text:style-name="P54"><text:span text:style-name="T39"><text:tab/></text:span><text:span text:style-name="T122">bool</text:span><text:span text:style-name="T40"> <text:tab/><text:tab/><text:tab/></text:span><text:span text:style-name="T123">and_gate</text:span><text:span text:style-name="T40">(</text:span><text:span text:style-name="T122">bool</text:span><text:span text:style-name="T121"> <text:tab/><text:tab/><text:tab/></text:span><text:span text:style-name="T22">a</text:span><text:span text:style-name="T21">,</text:span></text:p><text:p text:style-name="P54"><text:span text:style-name="T21"><text:tab/><text:tab/><text:tab/><text:tab/><text:tab/><text:tab/> <text:s text:c="3"/></text:span><text:span text:style-name="T122">bool</text:span><text:span text:style-name="T121"><text:tab/><text:tab/><text:tab/></text:span><text:span text:style-name="T22">b</text:span><text:span text:style-name="T40">)</text:span></text:p><text:p text:style-name="P122"><text:tab/>{</text:p><text:p text:style-name="P55"><text:span text:style-name="T40"><text:tab/><text:tab/></text:span><text:span text:style-name="T133">return</text:span><text:span text:style-name="T38"> (a &amp;&amp; b);</text:span></text:p><text:p text:style-name="P55"><text:span text:style-name="T40"><text:tab/></text:span><text:span text:style-name="T38">}</text:span></text:p><text:p text:style-name="P53"/></draw:text-box></draw:frame></text:p>
      <text:p text:style-name="P18"/>
      <text:p text:style-name="P18"/>
      <text:p text:style-name="P18"/>
      <text:p text:style-name="P18"/>
      <text:p text:style-name="P18"/>
      <text:p text:style-name="P18"/>
      <text:p text:style-name="P99"><text:tab/></text:p>
      <text:p text:style-name="P25"><text:span text:style-name="T109"><text:tab/></text:span><text:span text:style-name="T110">There is plenty of chipsets. Some of them are primitive, like the 4081, some others bring more complicated functions like counting or serialising functions. Microprocessors are one of the more complicated family of chipset existing by providing interpreters.</text:span></text:p>
      <text:p text:style-name="P105"/>
      <text:p text:style-name="P105"><text:tab/>Of course, microprocessors are built with more simple chip, which happened ot be built from components like the 4081 chipset. Everything can be redureced to boolean logic.</text:p>
      <text:p text:style-name="P71"><text:span text:style-name="T60">05</text:span><text:span text:style-name="T57"> – </text:span><text:span text:style-name="T60">Undefined states</text:span></text:p>
      <text:p text:style-name="P78"/>
      <text:p text:style-name="P78"/>
      <text:p text:style-name="P78"/>
      <text:p text:style-name="P25"><text:span text:style-name="T111"><text:tab/></text:span><text:span text:style-name="T110">The boolean algebra is composed of only two states : </text:span><text:span text:style-name="T120">true</text:span><text:span text:style-name="T110"> and </text:span><text:span text:style-name="T120">false</text:span><text:span text:style-name="T110">. In the electronic worl, </text:span><text:span text:style-name="T120">true</text:span><text:span text:style-name="T110"> means VCC volt. VCC is the alimentation of the system. In a lot of case, VCC is 5 volt. In the electronic world, </text:span><text:span text:style-name="T120">false</text:span><text:span text:style-name="T110"> means, in most cases, 0 volts.</text:span></text:p>
      <text:p text:style-name="P105"/>
      <text:p text:style-name="P130"><text:span text:style-name="T77"><text:tab/>It creates a problem we won’t </text:span><text:span text:style-name="T78">handle</text:span><text:span text:style-name="T77"> here : there is a lot of value under 0 and a lot above 5, and even an infinite between 0 and 5.</text:span></text:p>
      <text:p text:style-name="P105"/>
      <text:p text:style-name="P130"><text:span text:style-name="T77"><text:tab/>It also creates another problem we will have to </text:span><text:span text:style-name="T78">handle</text:span><text:span text:style-name="T77">: What if a component A needs to know the value S the compute its output, but S needs its output to be defined ?</text:span></text:p>
      <text:p text:style-name="P105"/>
      <text:p text:style-name="P105"><text:tab/>The answer cannot be <text:span text:style-name="T14">true</text:span> or <text:span text:style-name="T14">false</text:span>. The anwser is that the value is <text:span text:style-name="T14">undefined</text:span>, a third state. So you will not compute pure boolean algebra. You will have to integrate undefined states : one if you don’t know what value is. <text:span text:style-name="T126">But also a</text:span>nother one if there is <text:span text:style-name="T14">true</text:span> and <text:span text:style-name="T14">false</text:span> mixed on the same wire : <text:span text:style-name="T126">an error.</text:span></text:p>
      <text:p text:style-name="P105"/>
      <text:p text:style-name="P105"><text:tab/>G<text:span text:style-name="T126">et</text:span> out bool ! Welcome <text:span text:style-name="T14">enum</text:span> !</text:p>
      <text:p text:style-name="P72"><text:span text:style-name="T60">06</text:span><text:span text:style-name="T57"> – </text:span><text:span text:style-name="T61">The project</text:span></text:p>
      <text:p text:style-name="P79"/>
      <text:p text:style-name="P79"/>
      <text:p text:style-name="P26"><text:span text:style-name="T111"><text:tab/></text:span><text:span text:style-name="T2">RED</text:span><text:span text:style-name="T130">SPICE</text:span><text:span text:style-name="T112"> is a logic simulator that is able to build a graph thanks to a configuration file, as well as injected values inside the graph to get results.</text:span></text:p>
      <text:p text:style-name="P106"/>
      <text:p text:style-name="P37"><text:span text:style-name="T99"><text:tab/>The Configuration File</text:span></text:p>
      <text:p text:style-name="P107"/>
      <text:p text:style-name="P28"><text:span text:style-name="T99"><text:tab/></text:span><text:span text:style-name="T100">Here is an example of configuration file. </text:span><text:span text:style-name="T104">It uses a small </text:span><text:span text:style-name="T119">HDL</text:span><text:span text:style-name="T104"> (Hardware description langage). </text:span><text:span text:style-name="T100">It contains a graph description.</text:span></text:p>
      <text:p text:style-name="P21"><draw:frame draw:style-name="fr1" draw:name="Frame1" text:anchor-type="paragraph" svg:x="0.85cm" svg:y="0.34cm" svg:width="15.436cm" draw:z-index="21"><draw:text-box fo:min-height="1.415cm"><text:p text:style-name="P52"/><text:p text:style-name="P54"><text:span text:style-name="T39"><text:tab/></text:span><text:span text:style-name="T4">#tree inputs and gate</text:span></text:p><text:p text:style-name="P54"><text:span text:style-name="T41"><text:tab/></text:span><text:span text:style-name="T124">.chipsets:</text:span></text:p><text:p text:style-name="P54"><text:span text:style-name="T41"><text:tab/></text:span><text:span text:style-name="T125">input</text:span><text:span text:style-name="T41"> </text:span><text:span text:style-name="T23">i0</text:span></text:p><text:p text:style-name="P54"><text:span text:style-name="T41"><text:tab/></text:span><text:span text:style-name="T125">input</text:span><text:span text:style-name="T41"> </text:span><text:span text:style-name="T23">i1</text:span></text:p><text:p text:style-name="P54"><text:span text:style-name="T41"><text:tab/></text:span><text:span text:style-name="T125">input</text:span><text:span text:style-name="T41"> </text:span><text:span text:style-name="T23">i2</text:span></text:p><text:p text:style-name="P54"><text:span text:style-name="T41"><text:tab/></text:span><text:span text:style-name="T125">4081</text:span><text:span text:style-name="T41"> </text:span><text:span text:style-name="T23">and0</text:span></text:p><text:p text:style-name="P54"><text:span text:style-name="T41"><text:tab/></text:span><text:span text:style-name="T125">output</text:span><text:span text:style-name="T41"> </text:span><text:span text:style-name="T23">out</text:span></text:p><text:p text:style-name="P123"/><text:p text:style-name="P54"><text:span text:style-name="T41"><text:tab/></text:span><text:span text:style-name="T124">.links:</text:span></text:p><text:p text:style-name="P123"><text:tab/><text:span text:style-name="T20">i0</text:span>:1 <text:span text:style-name="T20">and0</text:span>:1</text:p><text:p text:style-name="P123"><text:tab/><text:span text:style-name="T20">i1</text:span>:1 <text:span text:style-name="T20">and0</text:span>:2</text:p><text:p text:style-name="P123"/><text:p text:style-name="P123"><text:tab/><text:span text:style-name="T20">and0</text:span>:3 <text:span text:style-name="T20">and0</text:span>:5</text:p><text:p text:style-name="P123"><text:tab/><text:span text:style-name="T20">i2</text:span>:1 <text:span text:style-name="T20">and0</text:span>:6</text:p><text:p text:style-name="P123"/><text:p text:style-name="P123"><text:tab/><text:span text:style-name="T20">and0</text:span>:4 <text:span text:style-name="T20">out</text:span>:1</text:p><text:p text:style-name="P123"/></draw:text-box></draw:frame></text:p>
      <text:p text:style-name="P19"/>
      <text:p text:style-name="P19"/>
      <text:p text:style-name="P19"/>
      <text:p text:style-name="P19"/>
      <text:p text:style-name="P19"/>
      <text:p text:style-name="P19"/>
      <text:p text:style-name="P100"><text:tab/></text:p>
      <text:p text:style-name="P100"><text:tab/></text:p>
      <text:p text:style-name="P100"/>
      <text:p text:style-name="P100"/>
      <text:p text:style-name="P100"/>
      <text:p text:style-name="P100"/>
      <text:p text:style-name="P100"/>
      <text:p text:style-name="P100"/>
      <text:p text:style-name="P100"/>
      <text:p text:style-name="P100"/>
      <text:p text:style-name="P76"><text:span text:style-name="T114">D</text:span><text:span text:style-name="T113">escription</text:span></text:p>
      <text:p text:style-name="P109"/>
      <text:p text:style-name="P27"><text:span text:style-name="T97"><text:tab/></text:span><text:span text:style-name="T117">The first part,</text:span><text:span text:style-name="T101"> which star</text:span><text:span text:style-name="T107">ts</text:span><text:span text:style-name="T101"> with the « .</text:span><text:span text:style-name="T117">chipsets</text:span><text:span text:style-name="T101">: » statement allows you to declare components that will be used by the program and name them. </text:span><text:span text:style-name="T108">Components may be shared library or other configuration file.</text:span><text:span text:style-name="T101"> Some components may need a value. This value will be passed right after the name between parenthesis. </text:span><text:span text:style-name="T118">Input</text:span><text:span text:style-name="T105"> and </text:span><text:span text:style-name="T118">output</text:span><text:span text:style-name="T105"> components can be numbered with ‘ :’ followed by a digit </text:span><text:span text:style-name="T106">to allow the whole file to be used as component by other configuration files.</text:span></text:p>
      <text:p text:style-name="P114"/>
      <text:p text:style-name="P114"><text:tab/><text:span text:style-name="T14">The second part,</text:span> which stars with the « <text:span text:style-name="T14">links</text:span>: » statement allows you to declare links between components. You have to precise which component you wish to link and which pin.</text:p>
      <text:p text:style-name="P114"/>
      <text:p text:style-name="P114"><text:tab/>Space between keywords on the same line may be spaces or tabs. <text:span text:style-name="T127">Their amount is irrelevant</text:span>. Newline terminates the statement.</text:p>
      <text:p text:style-name="P114"/>
      <text:p text:style-name="P27"><text:soft-page-break/><text:span text:style-name="T101"/></text:p>
      <text:p text:style-name="P27"><text:span text:style-name="T101"><text:tab/>Comments start with a ‘#’ and finish with a newline. A comment can be either at the start of a line, or </text:span><text:span text:style-name="T102">after an instruction.</text:span></text:p>
      <text:p text:style-name="P115"/>
      <text:p text:style-name="P115"><text:tab/>Here are a few special components :</text:p>
      <text:p text:style-name="P115"/>
      <text:p text:style-name="P27"><text:span text:style-name="T102"><text:tab/>- </text:span><text:span text:style-name="T116">input</text:span><text:span text:style-name="T102"> : Creates a value directory linked to the command line. The value may be 0 or 1 and must be given this way : ./redspice </text:span><text:span text:style-name="T103">circuit_file.rs input_name=input_value</text:span></text:p>
      <text:p text:style-name="P116"/>
      <text:p text:style-name="P27"><text:span text:style-name="T103"><text:tab/>- </text:span><text:span text:style-name="T115">clock</text:span><text:span text:style-name="T103"> : Creates an input that works the same way as input except that its value is inverted after each simulation.</text:span></text:p>
      <text:p text:style-name="P116"/>
      <text:p text:style-name="P27"><text:span text:style-name="T103"><text:tab/>- </text:span><text:span text:style-name="T115">true</text:span><text:span text:style-name="T103"> : This component have one pin that is always true.</text:span></text:p>
      <text:p text:style-name="P116"/>
      <text:p text:style-name="P27"><text:span text:style-name="T103"><text:tab/>- </text:span><text:span text:style-name="T115">false</text:span><text:span text:style-name="T103"> : This component have one pin that is always false.</text:span></text:p>
      <text:p text:style-name="P116"/>
      <text:p text:style-name="P27"><text:span text:style-name="T103"><text:tab/>- </text:span><text:span text:style-name="T115">output</text:span><text:span text:style-name="T103"> : Creates an output that writes its state on stdout at the end of each simulation. If there are several outputs, they must be ascii sorted.</text:span></text:p>
      <text:p text:style-name="P116"/>
      <text:p text:style-name="P119">Errors</text:p>
      <text:p text:style-name="P110"/>
      <text:p text:style-name="P131"><text:span text:style-name="T86"><text:tab/></text:span><text:span text:style-name="T87">When one of the following cases happens. </text:span><text:span text:style-name="T2">RED</text:span><text:span text:style-name="T69">SPICE</text:span><text:span text:style-name="T79"> </text:span><text:span text:style-name="T87">must ra</text:span><text:span text:style-name="T88">i</text:span><text:span text:style-name="T87">se an exception and stop the execution of the program neattly. It is forbidden to raise scalar excceptions. Moreover, exception classes must inherit from std::exception of the STL.</text:span></text:p>
      <text:p text:style-name="P131"><text:span text:style-name="T87"/></text:p>
      <text:p text:style-name="P131"><text:span text:style-name="T87">- </text:span><text:span text:style-name="T88">The circuit file includes one or several lexical errors or syntactic errors.</text:span></text:p>
      <text:p text:style-name="P131"><text:span text:style-name="T88"/></text:p>
      <text:p text:style-name="P131"><text:span text:style-name="T88"><text:tab/>- </text:span><text:span text:style-name="T89">A component type is unknown (Shared library or .hdl file not found).</text:span></text:p>
      <text:p text:style-name="P131"><text:span text:style-name="T89"><text:tab/>- A component name is unknown.</text:span></text:p>
      <text:p text:style-name="P131"><text:span text:style-name="T89"><text:tab/>- A given pin odes not exist.</text:span></text:p>
      <text:p text:style-name="P131"><text:span text:style-name="T89"><text:tab/>- Several components share the same name.</text:span></text:p>
      <text:p text:style-name="P131"><text:span text:style-name="T89"><text:tab/>- Not every output are linked.</text:span></text:p>
      <text:p text:style-name="P131"><text:span text:style-name="T89"><text:tab/>- Missing input value on command line.</text:span></text:p>
      <text:p text:style-name="P131"><text:span text:style-name="T89"><text:tab/>- Unknown input specified by command line.</text:span></text:p>
      <text:p text:style-name="P131"><text:span text:style-name="T89"><text:tab/>- No chipsets section.</text:span></text:p>
      <text:p text:style-name="P131"><text:span text:style-name="T89"><text:tab/>- No links section.</text:span></text:p>
      <text:p text:style-name="P131"><text:span text:style-name="T89"><text:tab/>- Some inputs and outputs are numbered and some others are not.</text:span></text:p>
      <text:p text:style-name="P131"><text:span text:style-name="T89"/></text:p>
      <text:p text:style-name="P137"><text:span text:style-name="T85"><text:tab/>Perhaps there are others errors… However, your simulateur must never crash !</text:span></text:p>
      <text:p text:style-name="P136"><text:span text:style-name="T89"/></text:p>
      <text:p text:style-name="P149">Execution</text:p>
      <text:p text:style-name="P111"/>
      <text:p text:style-name="P132"><text:span text:style-name="T86"><text:tab/></text:span><text:span text:style-name="T90">Your simulator must be bale to run with a circuit file and inputs value passed as parameter. The simulator also reads on stdin a few commands.</text:span></text:p>
      <text:p text:style-name="P132"><text:span text:style-name="T90"/></text:p>
      <text:p text:style-name="P132"><text:span text:style-name="T90"><text:tab/>- </text:span><text:span text:style-name="T93">exit</text:span><text:span text:style-name="T90"> : it closes the program.</text:span></text:p>
      <text:p text:style-name="P132"><text:span text:style-name="T90"/></text:p>
      <text:p text:style-name="P132"><text:span text:style-name="T90"><text:tab/>- </text:span><text:span text:style-name="T93">display</text:span><text:span text:style-name="T90"> : it prints on stdout the value of all outputs sorted by name.</text:span></text:p>
      <text:p text:style-name="P132"><text:span text:style-name="T90"/></text:p>
      <text:p text:style-name="P132"><text:span text:style-name="T90"><text:tab/>- </text:span><text:span text:style-name="T93">input=value</text:span><text:span text:style-name="T90"> : it changes the value of an input (not a clock!)</text:span></text:p>
      <text:p text:style-name="P132"><text:span text:style-name="T90"/></text:p>
      <text:p text:style-name="P132"><text:span text:style-name="T90"><text:tab/>- </text:span><text:span text:style-name="T93">simulate</text:span><text:span text:style-name="T90"> : it launches a simulation.</text:span></text:p>
      <text:p text:style-name="P132"><text:span text:style-name="T90"/></text:p>
      <text:p text:style-name="P132"><text:span text:style-name="T90"><text:tab/>- </text:span><text:span text:style-name="T93">loop</text:span><text:span text:style-name="T90"> : it simulates without prompting again until S</text:span><text:span text:style-name="T91">INGINT</text:span><text:span text:style-name="T90">. If </text:span><text:span text:style-name="T91">SIGINT</text:span><text:span text:style-name="T90"> is received. The prompt comes back.</text:span></text:p>
      <text:p text:style-name="P132"><text:span text:style-name="T90"/></text:p>
      <text:p text:style-name="P132"><text:span text:style-name="T90"><text:tab/>- </text:span><text:span text:style-name="T93">dump</text:span><text:span text:style-name="T90"> : call the Dump method of every IComponent.</text:span></text:p>
      <text:p text:style-name="P132"><text:span text:style-name="T90"/></text:p>
      <text:p text:style-name="P138"><text:span text:style-name="T85"><text:tab/>Your simulator must launch one simulation directoy after being launched, the display. Your simulator must handle CTRL+D correctly.</text:span></text:p>
      <text:p text:style-name="P138"><text:span text:style-name="T85"/></text:p>
      <text:p text:style-name="P138"><text:span text:style-name="T85"><text:tab/>Now let’s see </text:span><text:span text:style-name="T91">an</text:span><text:span text:style-name="T85"> example of execution :</text:span></text:p>
      <text:p text:style-name="P83"><draw:frame draw:style-name="fr1" draw:name="Cadre2" text:anchor-type="paragraph" svg:x="0.85cm" svg:y="0.34cm" svg:width="15.436cm" draw:z-index="24"><draw:text-box fo:min-height="1.415cm"><text:p text:style-name="P124"/><text:p text:style-name="P141"><text:span text:style-name="T6"><text:s text:c="4"/>$&gt; </text:span><text:span text:style-name="T5">cat -e or_gate.</text:span><text:span text:style-name="T6">hdl</text:span></text:p><text:p text:style-name="P126"><text:span text:style-name="T4"><text:s text:c="4"/>.chipsets:</text:span></text:p><text:p text:style-name="P126"><text:span text:style-name="T4"><text:s text:c="4"/>input a</text:span></text:p><text:p text:style-name="P126"><text:span text:style-name="T4"><text:s text:c="4"/>input b</text:span></text:p><text:p text:style-name="P126"><text:span text:style-name="T4"><text:s text:c="4"/>4071 or</text:span></text:p><text:p text:style-name="P126"><text:span text:style-name="T4"><text:s text:c="4"/>output s</text:span></text:p><text:p text:style-name="P126"><text:span text:style-name="T4"><text:s text:c="4"/>.links:</text:span></text:p><text:p text:style-name="P126"><text:span text:style-name="T4"><text:s text:c="4"/>a:1 or:1</text:span></text:p><text:p text:style-name="P126"><text:span text:style-name="T4"><text:s text:c="4"/>b:1 or:2</text:span></text:p><text:p text:style-name="P126"><text:span text:style-name="T4"><text:s text:c="4"/>or:3 s:1</text:span></text:p><text:p text:style-name="P141"><text:span text:style-name="T5"><text:s text:c="4"/>./</text:span><text:span text:style-name="T6">red</text:span><text:span text:style-name="T5">spice or_gate.</text:span><text:span text:style-name="T6">hdl</text:span><text:span text:style-name="T5"> a=0 b=0</text:span></text:p><text:p text:style-name="P126"><text:span text:style-name="T4"><text:s text:c="4"/>s=0</text:span></text:p><text:p text:style-name="P126"><text:span text:style-name="T4"><text:s text:c="4"/>&gt; a=1</text:span></text:p><text:p text:style-name="P126"><text:span text:style-name="T4"><text:s text:c="4"/>&gt; simulate</text:span></text:p><text:p text:style-name="P126"><text:span text:style-name="T4"><text:s text:c="4"/>&gt; display</text:span></text:p><text:p text:style-name="P126"><text:span text:style-name="T4"><text:s text:c="4"/>s=1</text:span></text:p><text:p text:style-name="P126"><text:span text:style-name="T4"><text:s text:c="4"/>&gt; exit</text:span></text:p><text:p text:style-name="P141"><text:span text:style-name="T5"><text:s text:c="4"/></text:span><text:span text:style-name="T6">$</text:span><text:span text:style-name="T5">&gt;</text:span></text:p><text:p text:style-name="P125"/></draw:text-box></draw:frame></text:p>
      <text:p text:style-name="P86"/>
      <text:p text:style-name="P86"/>
      <text:p text:style-name="P86"/>
      <text:p text:style-name="P86"/>
      <text:p text:style-name="P86"/>
      <text:p text:style-name="P86"/>
      <text:p text:style-name="P101"><text:tab/></text:p>
      <text:p text:style-name="P101"><text:tab/></text:p>
      <text:p text:style-name="P101"/>
      <text:p text:style-name="P101"/>
      <text:p text:style-name="P101"/>
      <text:p text:style-name="P101"/>
      <text:p text:style-name="P101"/>
      <text:p text:style-name="P101"/>
      <text:p text:style-name="P101"/>
      <text:p text:style-name="P101"><text:span text:style-name="T85"/></text:p>
      <text:p text:style-name="P101"><text:span text:style-name="T85"/></text:p>
      <text:p text:style-name="P101"><text:span text:style-name="T85"/></text:p>
      <text:p text:style-name="P101"><text:span text:style-name="T85"/></text:p>
      <text:p text:style-name="P101"><text:span text:style-name="T85"/></text:p>
      <text:p text:style-name="P151"><text:span text:style-name="T60">0</text:span><text:span text:style-name="T64">7</text:span><text:span text:style-name="T57"> – </text:span><text:span text:style-name="T64">Technical considerations</text:span></text:p>
      <text:p text:style-name="P80"/>
      <text:p text:style-name="P80"/>
      <text:p text:style-name="P80"/>
      <text:p text:style-name="P133"><text:span text:style-name="T80"><text:tab/></text:span><text:span text:style-name="T81">In order to help you with your code, we give you the following instructions that you have to respect. For each instruction, you must understand why this particular one is imposed. We are not providing these instructions randomly or to bore you to death !</text:span></text:p>
      <text:p text:style-name="P133"><text:span text:style-name="T81"/></text:p>
      <text:p text:style-name="P120"><text:span text:style-name="T137">T</text:span>he Icomponent interface</text:p>
      <text:p text:style-name="P112"/>
      <text:p text:style-name="P133"><text:span text:style-name="T86"><text:tab/></text:span><text:span text:style-name="T91">Each of your component classes UST implement the following Icomponent interface :</text:span></text:p>
      <text:p text:style-name="P139"/>
      <text:p text:style-name="P84"><draw:frame draw:style-name="fr1" draw:name="Cadre3" text:anchor-type="paragraph" svg:x="0.85cm" svg:y="0.34cm" svg:width="15.436cm" draw:z-index="25"><draw:text-box fo:min-height="1.415cm"><text:p text:style-name="P144"><text:span text:style-name="T8"/></text:p><text:p text:style-name="P141"><text:span text:style-name="T9"><text:tab/>// </text:span><text:span text:style-name="T10">La Caverne Aux Lapins Noirs</text:span><text:span text:style-name="T9"> 1999-2042</text:span></text:p><text:p text:style-name="P143"><text:span text:style-name="T8"><text:tab/>// Jason Brillante "</text:span><text:span text:style-name="T7">Damdoshi"</text:span></text:p><text:p text:style-name="P143"><text:span text:style-name="T8"><text:tab/>//</text:span></text:p><text:p text:style-name="P143"><text:span text:style-name="T8"><text:tab/>// </text:span><text:span text:style-name="T7">Red</text:span><text:span text:style-name="T8">Spice</text:span></text:p><text:p text:style-name="P143"><text:span text:style-name="T8"/></text:p><text:p text:style-name="P143"><text:span text:style-name="T8"><text:tab/></text:span><text:span text:style-name="T144">#ifndef</text:span><text:span text:style-name="T8"> </text:span><text:span text:style-name="T24">__ICOMPONENT_HPP__</text:span></text:p><text:p text:style-name="P143"><text:span text:style-name="T8"><text:tab/></text:span><text:span text:style-name="T144"># define</text:span><text:span text:style-name="T8"> </text:span><text:span text:style-name="T24">__ICOMPONENT_HPP__</text:span></text:p><text:p text:style-name="P143"><text:span text:style-name="T8"/></text:p><text:p text:style-name="P143"><text:span text:style-name="T8"><text:tab/></text:span><text:span text:style-name="T134">namespace</text:span><text:span text:style-name="T8"> </text:span><text:span text:style-name="T141">rs</text:span></text:p><text:p text:style-name="P143"><text:span text:style-name="T8"><text:tab/>{</text:span></text:p><text:p text:style-name="P143"><text:span text:style-name="T8"><text:tab/> <text:s/></text:span><text:span text:style-name="T134">enum </text:span><text:span text:style-name="T140">Tristate</text:span></text:p><text:p text:style-name="P143"><text:span text:style-name="T8"><text:tab/> <text:s text:c="3"/>{</text:span></text:p><text:p text:style-name="P141"><text:span text:style-name="T9"><text:tab/><text:tab/></text:span><text:span text:style-name="T26">BROKEN</text:span><text:span text:style-name="T10"> = -2,</text:span></text:p><text:p text:style-name="P143"><text:span text:style-name="T8"><text:tab/> <text:s text:c="5"/></text:span><text:span text:style-name="T24">UNDEFINED</text:span><text:span text:style-name="T8"> = -</text:span><text:span text:style-name="T7">1</text:span><text:span text:style-name="T8">,</text:span></text:p><text:p text:style-name="P143"><text:span text:style-name="T8"><text:tab/> <text:s text:c="5"/></text:span><text:span text:style-name="T24">FALSE</text:span><text:span text:style-name="T8"><text:tab/>= </text:span><text:span text:style-name="T7">0,</text:span></text:p><text:p text:style-name="P145"><text:span text:style-name="T8"><text:tab/> <text:s text:c="5"/></text:span><text:span text:style-name="T24">TRUE</text:span><text:span text:style-name="T8"><text:tab/>= </text:span><text:span text:style-name="T7">1</text:span></text:p><text:p text:style-name="P143"><text:span text:style-name="T8"><text:tab/> <text:s text:c="3"/>};</text:span></text:p><text:p text:style-name="P143"><text:span text:style-name="T8"/></text:p><text:p text:style-name="P143"><text:span text:style-name="T8"><text:tab/> <text:s/></text:span><text:span text:style-name="T134">class</text:span><text:span text:style-name="T8"> </text:span><text:span text:style-name="T140">IComponent</text:span></text:p><text:p text:style-name="P143"><text:span text:style-name="T8"><text:tab/> <text:s/>{</text:span></text:p><text:p text:style-name="P143"><text:span text:style-name="T8"><text:tab/> <text:s/></text:span><text:span text:style-name="T134">public</text:span><text:span text:style-name="T8">:</text:span></text:p><text:p text:style-name="P143"><text:span text:style-name="T8"><text:tab/> <text:s text:c="3"/>/// Compute value of the precised pin</text:span></text:p><text:p text:style-name="P143"><text:span text:style-name="T8"><text:tab/> <text:s text:c="3"/></text:span><text:span text:style-name="T134">virtual</text:span><text:span text:style-name="T8"> </text:span><text:span text:style-name="T146">r</text:span><text:span text:style-name="T147">s</text:span><text:span text:style-name="T8">::</text:span><text:span text:style-name="T140">Tristate</text:span><text:span text:style-name="T8"> </text:span><text:span text:style-name="T144">Compute</text:span><text:span text:style-name="T8">(</text:span><text:span text:style-name="T140">size_t</text:span><text:span text:style-name="T8"> <text:tab/></text:span><text:span text:style-name="T24">pin_num_this</text:span><text:span text:style-name="T8"> = 1) = 0;</text:span></text:p><text:p text:style-name="P143"><text:span text:style-name="T8"><text:tab/></text:span></text:p><text:p text:style-name="P143"><text:span text:style-name="T8"><text:tab/> <text:s text:c="3"/>/// Useful to link IComponent together</text:span></text:p><text:p text:style-name="P143"><text:span text:style-name="T8"><text:tab/> <text:s text:c="3"/></text:span><text:span text:style-name="T134">virtual</text:span><text:span text:style-name="T8"> </text:span><text:span text:style-name="T140">void</text:span><text:span text:style-name="T8"> </text:span><text:span text:style-name="T144">SetLink</text:span><text:span text:style-name="T8">(</text:span><text:span text:style-name="T140">size_t</text:span><text:span text:style-name="T8"><text:tab/><text:tab/></text:span><text:span text:style-name="T24">pin_num_this</text:span><text:span text:style-name="T8">,</text:span></text:p><text:p text:style-name="P141"><text:span text:style-name="T9"><text:tab/><text:tab/><text:tab/><text:tab/><text:tab/> </text:span><text:span text:style-name="T148">rs</text:span><text:span text:style-name="T9">::</text:span><text:span text:style-name="T142">IComponent</text:span><text:span text:style-name="T9"> <text:s text:c="2"/>&amp;</text:span><text:span text:style-name="T25">component</text:span><text:span text:style-name="T9">,</text:span></text:p><text:p text:style-name="P143"><text:span text:style-name="T8"><text:tab/><text:tab/><text:tab/><text:tab/><text:tab/> </text:span><text:span text:style-name="T140">size_t</text:span><text:span text:style-name="T8"> <text:tab/><text:tab/></text:span><text:span text:style-name="T24">pin_num_target</text:span><text:span text:style-name="T8">) = 0;</text:span></text:p><text:p text:style-name="P143"><text:span text:style-name="T8"><text:tab/></text:span></text:p><text:p text:style-name="P143"><text:span text:style-name="T8"><text:tab/> <text:s text:c="3"/>///// Print on terminal the name of the component and</text:span></text:p><text:p text:style-name="P143"><text:span text:style-name="T8"><text:tab/> <text:s text:c="3"/>//// the state of every pin of the current component</text:span></text:p><text:p text:style-name="P143"><text:span text:style-name="T8"><text:tab/> <text:s text:c="3"/>/// The output won't be tested, but it may help you</text:span></text:p><text:p text:style-name="P143"><text:span text:style-name="T8"><text:tab/> <text:s text:c="3"/>// as a trace.</text:span></text:p><text:p text:style-name="P143"><text:span text:style-name="T8"><text:tab/> <text:s text:c="3"/></text:span><text:span text:style-name="T134">virtual</text:span><text:span text:style-name="T8"> </text:span><text:span text:style-name="T140">void</text:span><text:span text:style-name="T8"> </text:span><text:span text:style-name="T144">Dump</text:span><text:span text:style-name="T8">(</text:span><text:span text:style-name="T140">void</text:span><text:span text:style-name="T8">) </text:span><text:span text:style-name="T134">const</text:span><text:span text:style-name="T8"> = 0;</text:span></text:p><text:p text:style-name="P143"><text:span text:style-name="T8"><text:tab/></text:span></text:p><text:p text:style-name="P143"><text:span text:style-name="T8"><text:tab/> <text:s text:c="3"/></text:span><text:span text:style-name="T134">virtual</text:span><text:span text:style-name="T8"> ~</text:span><text:span text:style-name="T144">IComponent</text:span><text:span text:style-name="T8">(</text:span><text:span text:style-name="T140">void</text:span><text:span text:style-name="T8">) {}</text:span></text:p><text:p text:style-name="P143"><text:span text:style-name="T8"><text:tab/> <text:s/>};</text:span></text:p><text:p text:style-name="P143"><text:span text:style-name="T8"><text:tab/>}</text:span></text:p><text:p text:style-name="P143"><text:span text:style-name="T8"><text:tab/></text:span></text:p><text:p text:style-name="P143"><text:span text:style-name="T8"><text:tab/></text:span><text:span text:style-name="T144">#endif </text:span><text:span text:style-name="T8">// __ICOMPONENT_HPP__</text:span></text:p><text:p text:style-name="P127"/></draw:text-box></draw:frame></text:p>
      <text:p text:style-name="P87"/>
      <text:p text:style-name="P87"/>
      <text:p text:style-name="P87"/>
      <text:p text:style-name="P87"/>
      <text:p text:style-name="P87"/>
      <text:p text:style-name="P87"/>
      <text:p text:style-name="P102"><text:tab/></text:p>
      <text:p text:style-name="P102"><text:tab/></text:p>
      <text:p text:style-name="P102"/>
      <text:p text:style-name="P102"/>
      <text:p text:style-name="P102"/>
      <text:p text:style-name="P102"/>
      <text:p text:style-name="P102"/>
      <text:p text:style-name="P102"/>
      <text:p text:style-name="P102"/>
      <text:p text:style-name="P102"><text:span text:style-name="T85"/></text:p>
      <text:p text:style-name="P102"><text:span text:style-name="T85"/></text:p>
      <text:p text:style-name="P102"><text:span text:style-name="T85"/></text:p>
      <text:p text:style-name="P102"><text:span text:style-name="T85"/></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pan text:style-name="T91"/></text:p>
      <text:p text:style-name="P102"><text:soft-page-break/><text:span text:style-name="T91"/></text:p>
      <text:p text:style-name="P102"><text:span text:style-name="T138"><text:tab/></text:span><text:span text:style-name="T139">Component classes implementing the Icomponent interface are the following ones. You can fin manuals about these components in the project ressources.</text:span></text:p>
      <text:p text:style-name="P102"><text:span text:style-name="T139"/></text:p>
      <text:p text:style-name="P102"><text:span text:style-name="T139"><text:tab/>- </text:span><text:span text:style-name="T16">4001</text:span><text:span text:style-name="T139"> : Four NOR gates.</text:span></text:p>
      <text:p text:style-name="P102"><text:span text:style-name="T139"/></text:p>
      <text:p text:style-name="P102"><text:span text:style-name="T139"><text:tab/>- </text:span><text:span text:style-name="T16">4008</text:span><text:span text:style-name="T139"> : 4 bits adder.</text:span></text:p>
      <text:p text:style-name="P102"><text:span text:style-name="T139"/></text:p>
      <text:p text:style-name="P102"><text:span text:style-name="T139"><text:tab/>- </text:span><text:span text:style-name="T16">4011</text:span><text:span text:style-name="T139"> : Four NAND gates.</text:span></text:p>
      <text:p text:style-name="P102"><text:span text:style-name="T139"/></text:p>
      <text:p text:style-name="P102"><text:span text:style-name="T139"><text:tab/>- </text:span><text:span text:style-name="T16">4013</text:span><text:span text:style-name="T139"> : Dual flip flop.</text:span></text:p>
      <text:p text:style-name="P102"><text:span text:style-name="T139"/></text:p>
      <text:p text:style-name="P102"><text:span text:style-name="T139"><text:tab/>- </text:span><text:span text:style-name="T16">4017</text:span><text:span text:style-name="T139"> : 10 bits Johnson decade.</text:span></text:p>
      <text:p text:style-name="P102"><text:span text:style-name="T139"/></text:p>
      <text:p text:style-name="P102"><text:span text:style-name="T139"><text:tab/>- </text:span><text:span text:style-name="T16">4030</text:span><text:span text:style-name="T139"> : Four XOR gates.</text:span></text:p>
      <text:p text:style-name="P102"><text:span text:style-name="T139"/></text:p>
      <text:p text:style-name="P102"><text:span text:style-name="T139"><text:tab/>- </text:span><text:span text:style-name="T16">4040</text:span><text:span text:style-name="T139"> : 12 bits binary counter.</text:span></text:p>
      <text:p text:style-name="P102"><text:span text:style-name="T139"/></text:p>
      <text:p text:style-name="P102"><text:span text:style-name="T139"><text:tab/>- </text:span><text:span text:style-name="T16">4069</text:span><text:span text:style-name="T139"> : Six inverter gates.</text:span></text:p>
      <text:p text:style-name="P102"><text:span text:style-name="T139"/></text:p>
      <text:p text:style-name="P102"><text:span text:style-name="T139"><text:tab/>- </text:span><text:span text:style-name="T16">4071</text:span><text:span text:style-name="T139"> : Four OR gates.</text:span></text:p>
      <text:p text:style-name="P102"><text:span text:style-name="T139"/></text:p>
      <text:p text:style-name="P102"><text:span text:style-name="T139"><text:tab/>- </text:span><text:span text:style-name="T16">4081</text:span><text:span text:style-name="T139"> : Four AND gates.</text:span></text:p>
      <text:p text:style-name="P102"><text:span text:style-name="T139"/></text:p>
      <text:p text:style-name="P102"><text:span text:style-name="T139"><text:tab/>- </text:span><text:span text:style-name="T16">4094</text:span><text:span text:style-name="T139"> : 8 bits shift register.</text:span></text:p>
      <text:p text:style-name="P102"><text:span text:style-name="T139"/></text:p>
      <text:p text:style-name="P102"><text:span text:style-name="T139"><text:tab/>- </text:span><text:span text:style-name="T16">4514</text:span><text:span text:style-name="T139"> : 4 bits decoder.</text:span></text:p>
      <text:p text:style-name="P102"><text:span text:style-name="T139"/></text:p>
      <text:p text:style-name="P102"><text:span text:style-name="T139"><text:tab/>- </text:span><text:span text:style-name="T16">4801</text:span><text:span text:style-name="T139"> : Random access memory.</text:span></text:p>
      <text:p text:style-name="P102"><text:span text:style-name="T139"/></text:p>
      <text:p text:style-name="P103"><text:span text:style-name="T139"><text:tab/>- </text:span><text:span text:style-name="T16">2716</text:span><text:span text:style-name="T139"> : Read only memory. 2716 must takes a value when declared. In the .chipsets : section, you must precise a file that will contain the data written in ROM.</text:span></text:p>
      <text:p text:style-name="P103"><text:span text:style-name="T139"><text:tab/><text:tab/>Example :</text:span></text:p>
      <text:p text:style-name="P103"><text:span text:style-name="T139"><text:tab/><text:tab/><text:tab/>2716 rom(cp_m.dat)</text:span></text:p>
      <text:p text:style-name="P92"><draw:frame draw:style-name="fr2" draw:name="Cadre4" text:anchor-type="paragraph" svg:x="0.85cm" svg:y="0.342cm" svg:width="15.436cm" draw:z-index="26"><draw:text-box fo:min-height="1.404cm"><text:p text:style-name="P128"/><text:p text:style-name="P129">it is FORBIDDEN to manipulate pointer or reference on each of these classes in your graph outside the initialization and the insertion. You are allowed to manipulate pointers ONLY on Icomponent.</text:p><text:p text:style-name="P129"/></draw:text-box></draw:frame></text:p>
      <text:p text:style-name="P93"/>
      <text:p text:style-name="P93"/>
      <text:p text:style-name="P93"/>
      <text:p text:style-name="P89"><text:span text:style-name="T139"/></text:p>
      <text:p text:style-name="P89"><text:span text:style-name="T139"/></text:p>
      <text:p text:style-name="P89"><text:span text:style-name="T139"/></text:p>
      <text:p text:style-name="P89"><text:span text:style-name="T139"/></text:p>
      <text:p text:style-name="P89"><text:span text:style-name="T139"/></text:p>
      <text:p text:style-name="P121"><text:soft-page-break/>Creation of a new IComponent</text:p>
      <text:p text:style-name="P113"/>
      <text:p text:style-name="P134"><text:span text:style-name="T86"><text:tab/></text:span><text:span text:style-name="T92">You have to write a member function of a class </text:span><text:span text:style-name="T94">relevant</text:span><text:span text:style-name="T92"> to your system that will allow you to create new components in a generic way. This function must have the following prototype :</text:span></text:p>
      <text:p text:style-name="P140"/>
      <text:p text:style-name="P85"><draw:frame draw:style-name="fr1" draw:name="Cadre6" text:anchor-type="paragraph" svg:x="0.85cm" svg:y="0.34cm" svg:width="15.436cm" draw:z-index="27"><draw:text-box fo:min-height="1.415cm"><text:p text:style-name="P146"><text:span text:style-name="T11"/></text:p><text:p text:style-name="P147"><text:span text:style-name="T11"><text:tab/></text:span><text:span text:style-name="T143">IComponent</text:span><text:span text:style-name="T12"> *</text:span><text:span text:style-name="T145">CreateComponent</text:span><text:span text:style-name="T11">(</text:span><text:span text:style-name="T135">const</text:span><text:span text:style-name="T12"> </text:span><text:span text:style-name="T149">std</text:span><text:span text:style-name="T12">::</text:span><text:span text:style-name="T143">string</text:span><text:span text:style-name="T12"> <text:s/><text:tab/> <text:s text:c="3"/>&amp;</text:span><text:span text:style-name="T27">type</text:span><text:span text:style-name="T12">,</text:span></text:p><text:p text:style-name="P147"><text:span text:style-name="T12"><text:tab/><text:tab/><text:tab/><text:tab/><text:tab/> <text:s text:c="3"/></text:span><text:span text:style-name="T135">const</text:span><text:span text:style-name="T12"> </text:span><text:span text:style-name="T149">std</text:span><text:span text:style-name="T12">::</text:span><text:span text:style-name="T143">string</text:span><text:span text:style-name="T12"> <text:s text:c="6"/>&amp;</text:span><text:span text:style-name="T27">value</text:span><text:span text:style-name="T12">) </text:span><text:span text:style-name="T136">const</text:span><text:span text:style-name="T12">;</text:span></text:p><text:p text:style-name="P127"/></draw:text-box></draw:frame></text:p>
      <text:p text:style-name="P88"/>
      <text:p text:style-name="P88"/>
      <text:p text:style-name="P88"/>
      <text:p text:style-name="P88"/>
      <text:p text:style-name="P142"><text:span text:style-name="T82"><text:tab/></text:span><text:span text:style-name="T83">Depending on the value of the string passed as parameter, the member function creates a new IComponent by loading a matching shared library or .hdl file.</text:span></text:p>
      <text:p text:style-name="P104"><text:tab/></text:p>
      <text:p text:style-name="P152"><text:span text:style-name="T60">0</text:span><text:span text:style-name="T65">8</text:span><text:span text:style-name="T57"> – </text:span><text:span text:style-name="T65">Bonus</text:span></text:p>
      <text:p text:style-name="P81"/>
      <text:p text:style-name="P81"/>
      <text:p text:style-name="P81"/>
      <text:p text:style-name="P135"><text:span text:style-name="T80"><text:tab/></text:span><text:span text:style-name="T84">There is several bonues available. Here are a few example :</text:span></text:p>
      <text:p text:style-name="P135"><text:span text:style-name="T84"/></text:p>
      <text:p text:style-name="P135"><text:span text:style-name="T84"><text:tab/>- Terminal output component </text:span><text:span text:style-name="T96">terminal</text:span><text:span text:style-name="T84">. Takes 8 bits as ascii code, and 1 bit which prints the character on stderr while switching from 0 to 1.</text:span></text:p>
      <text:p text:style-name="P135"><text:span text:style-name="T84"/></text:p>
      <text:p text:style-name="P135"><text:span text:style-name="T84"><text:tab/>- Graphic output of the graph. (Feel free to add a .graphic : section inside your configuration file with graphics information) You can also use </text:span><text:span text:style-name="T96">DOT</text:span><text:span text:style-name="T84"> file.</text:span></text:p>
      <text:p text:style-name="P135"><text:span text:style-name="T84"/></text:p>
      <text:p text:style-name="P135"><text:span text:style-name="T84"><text:tab/>- Graphic component </text:span><text:span text:style-name="T96">7seg</text:span><text:span text:style-name="T84"> : takes 4 bits as input. Display an hexadecimal number matching its entry on a graphical window.</text:span></text:p>
      <text:p text:style-name="P135"><text:span text:style-name="T84"/></text:p>
      <text:p text:style-name="P135"><text:span text:style-name="T84"><text:tab/>- Grahic component </text:span><text:span text:style-name="T96">matrix</text:span><text:span text:style-name="T84"> : takes 8 bits as a color shade and takes 12 bits as pixel select. Output is a 64*64 pixels picture in a graphical window.</text:span></text:p>
      <text:p text:style-name="P135"><text:span text:style-name="T84"/></text:p>
      <text:p text:style-name="P135"><text:span text:style-name="T84"><text:tab/>- </text:span><text:span text:style-name="T96">i4004</text:span><text:span text:style-name="T84"> or </text:span><text:span text:style-name="T96">RedSteel</text:span><text:span text:style-name="T84"> support (or any other microprocessor, even your own creation. Must be turing complete)</text:span></text:p>
      <text:p text:style-name="P135"><text:span text:style-name="T84"/></text:p>
      <text:p text:style-name="P135"><text:span text:style-name="T84"><text:tab/>- Stimulating a little computer.</text:span></text:p>
      <text:p text:style-name="P135"><text:span text:style-name="T84"/></text:p>
      <text:p text:style-name="P148"><text:span text:style-name="T84"><text:tab/>F</text:span><text:span text:style-name="T73">eel free to use SFML, SDL, Allegro or LibLapin for graphics </text:span><text:span text:style-name="T95">and for graphics on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Source Code Pro Black" svg:font-family="'Source Code Pro Black'" style:font-pitch="fixed"/>
    <style:font-face style:name="Source Code Pro Black1" svg:font-family="'Source Code Pro Black'" style:font-adornments="Light" style:font-pitch="fixed"/>
    <style:font-face style:name="FreeMono" svg:font-family="FreeMono" style:font-family-generic="modern" style:font-pitch="fixed"/>
    <style:font-face style:name="Futura" svg:font-family="Futura" style:font-pitch="variable"/>
    <style:font-face style:name="Futura Std" svg:font-family="'Futura Std'" style:font-pitch="variable"/>
    <style:font-face style:name="Futura Std Light2" svg:font-family="'Futura Std Light'" style:font-pitch="variable"/>
    <style:font-face style:name="Futura Std Light" svg:font-family="'Futura Std Light'" style:font-adornments="Light" style:font-pitch="variable"/>
    <style:font-face style:name="Liberation Serif1" svg:font-family="'Liberation Serif'" style:font-pitch="variable"/>
    <style:font-face style:name="Mephisto™" svg:font-family="Mephisto™" style:font-pitch="variable"/>
    <style:font-face style:name="Source Code Pro Black2" svg:font-family="'Source Code Pro Black'" style:font-adornments="Light" style:font-pitch="variable"/>
    <style:font-face style:name="FreeMono1" svg:font-family="FreeMono" style:font-family-generic="modern" style:font-pitch="variable"/>
    <style:font-face style:name="Liberation Serif" svg:font-family="'Liberation Serif'" style:font-family-generic="roman" style:font-pitch="variable"/>
    <style:font-face style:name="Futura Std Light1" svg:font-family="'Futura Std Light'" style:font-family-generic="swiss"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style:font-family-asian="Arial"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none"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min-row-height="0.011cm"/>
    </style:style>
    <style:style style:name="Table5.A1" style:family="table-cell">
      <style:table-cell-properties fo:padding="0.097cm" fo:border-left="none" fo:border-right="none" fo:border-top="none" fo:border-bottom="0.05pt solid #000000"/>
    </style:style>
    <style:style style:name="Table4" style:family="table">
      <style:table-properties style:width="16.902cm" table:align="margins" style:writing-mode="page"/>
    </style:style>
    <style:style style:name="Table4.A" style:family="table-column">
      <style:table-column-properties style:column-width="5.634cm" style:rel-column-width="21844*"/>
    </style:style>
    <style:style style:name="Table4.B" style:family="table-column">
      <style:table-column-properties style:column-width="5.634cm" style:rel-column-width="21845*"/>
    </style:style>
    <style:style style:name="Table4.C" style:family="table-column">
      <style:table-column-properties style:column-width="5.634cm" style:rel-column-width="21846*"/>
    </style:style>
    <style:style style:name="Table4.A1" style:family="table-cell">
      <style:table-cell-properties fo:padding="0.097cm" fo:border="none"/>
    </style:style>
    <style:style style:name="Table1" style:family="table">
      <style:table-properties style:width="16.902cm" table:align="margins" style:writing-mode="page"/>
    </style:style>
    <style:style style:name="Table1.A" style:family="table-column">
      <style:table-column-properties style:column-width="8.451cm" style:rel-column-width="32767*"/>
    </style:style>
    <style:style style:name="Table1.B" style:family="table-column">
      <style:table-column-properties style:column-width="8.451cm" style:rel-column-width="32768*"/>
    </style:style>
    <style:style style:name="MP1" style:family="paragraph" style:parent-style-name="Standard">
      <style:text-properties officeooo:paragraph-rsid="00161285"/>
    </style:style>
    <style:style style:name="MP2" style:family="paragraph" style:parent-style-name="Footer">
      <style:paragraph-properties fo:text-align="center" style:justify-single-word="false"/>
      <style:text-properties fo:color="#999999" style:font-name="Futura Std" fo:font-style="italic" fo:font-weight="bold" officeooo:rsid="002fb127" officeooo:paragraph-rsid="002fb127" style:font-style-asian="italic" style:font-weight-asian="bold" style:font-style-complex="italic" style:font-weight-complex="bold"/>
    </style:style>
    <style:style style:name="MP3" style:family="paragraph" style:parent-style-name="Footer">
      <style:text-properties style:font-name="Futura Std" officeooo:rsid="002fb127" officeooo:paragraph-rsid="002fb127"/>
    </style:style>
    <style:style style:name="MP4" style:family="paragraph" style:parent-style-name="Table_20_Contents">
      <style:paragraph-properties fo:text-align="end" style:justify-single-word="false"/>
      <style:text-properties style:font-name="Futura Std Light1" officeooo:paragraph-rsid="015c6a5d"/>
    </style:style>
    <style:style style:name="MP5" style:family="paragraph" style:parent-style-name="Footer">
      <style:text-properties style:font-name="Futura" officeooo:rsid="002eae5b" officeooo:paragraph-rsid="015c6a5d"/>
    </style:style>
    <style:style style:name="MP6" style:family="paragraph" style:parent-style-name="Table_20_Contents">
      <style:paragraph-properties fo:text-align="end" style:justify-single-word="false"/>
      <style:text-properties style:font-name="Futura Std Light1" officeooo:rsid="01a0b8fe" officeooo:paragraph-rsid="01a0b8fe"/>
    </style:style>
    <style:style style:name="MP7" style:family="paragraph" style:parent-style-name="Standard">
      <style:paragraph-properties fo:text-align="justify" style:justify-single-word="false"/>
      <style:text-properties style:font-name="Futura Std Light1" fo:font-size="12pt" fo:font-style="normal" fo:font-weight="normal" officeooo:rsid="018b9acb" officeooo:paragraph-rsid="01a0138a" style:font-size-asian="10.5pt" style:font-style-asian="normal" style:font-weight-asian="normal" style:font-size-complex="12pt" style:font-style-complex="normal" style:font-weight-complex="normal"/>
    </style:style>
    <style:style style:name="MP8" style:family="paragraph" style:parent-style-name="Footer">
      <style:paragraph-properties fo:text-align="center" style:justify-single-word="false"/>
      <style:text-properties style:font-name="Futura Std Light1" officeooo:paragraph-rsid="00356139"/>
    </style:style>
    <style:style style:name="MP9" style:family="paragraph" style:parent-style-name="Table_20_Contents">
      <style:paragraph-properties fo:text-align="center" style:justify-single-word="false"/>
      <style:text-properties style:font-name="Futura Std Light1" fo:font-size="10pt" officeooo:rsid="00161285" officeooo:paragraph-rsid="00161285" style:font-size-asian="10pt" style:font-size-complex="10pt"/>
    </style:style>
    <style:style style:name="MP10" style:family="paragraph" style:parent-style-name="Table_20_Contents">
      <style:paragraph-properties fo:text-align="start" style:justify-single-word="false"/>
      <style:text-properties style:font-name="Futura Std Light1" officeooo:rsid="00356139" officeooo:paragraph-rsid="00356139"/>
    </style:style>
    <style:style style:name="MP11" style:family="paragraph" style:parent-style-name="Standard">
      <style:paragraph-properties fo:text-align="end" style:justify-single-word="false"/>
      <style:text-properties fo:color="#000000" style:font-name="Futura Std Light1" fo:font-size="12pt" fo:font-style="normal" officeooo:rsid="00318772" officeooo:paragraph-rsid="00356139" style:font-size-asian="12pt" style:font-style-asian="normal" style:font-size-complex="12pt" style:font-style-complex="normal"/>
    </style:style>
    <style:style style:name="MT1" style:family="text">
      <style:text-properties officeooo:rsid="01a0b8fe"/>
    </style:style>
    <style:style style:name="MT2" style:family="text">
      <style:text-properties fo:color="#ff0000" style:font-name="Mephisto™" fo:font-size="14pt" officeooo:rsid="01881edb" style:font-size-asian="14pt" style:font-size-complex="14pt"/>
    </style:style>
    <style:style style:name="MT3" style:family="text">
      <style:text-properties fo:color="#999999" style:font-name="Mephisto™" fo:font-size="14pt" officeooo:rsid="01881edb" style:font-size-asian="14pt" style:font-size-complex="14pt"/>
    </style:style>
    <style:style style:name="MT4" style:family="text">
      <style:text-properties fo:color="#999999" style:font-name="Futura Std Light" officeooo:rsid="018f282a" style:font-size-asian="12pt"/>
    </style:style>
    <style:style style:name="MT5" style:family="text">
      <style:text-properties officeooo:rsid="01841e8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Line94720159821728">
            <table:table-cell table:style-name="Table3.A1" office:value-type="string">
              <text:p text:style-name="MP3"><draw:frame draw:style-name="Mfr1" draw:name="Image4" text:anchor-type="paragraph" svg:x="-1.506cm" svg:y="-1.279cm" svg:width="3.044cm" svg:height="2.85cm" draw:z-index="13"><draw:image xlink:href="Pictures/1000020100001B240000190598DC440914355D9B.png" xlink:type="simple" xlink:show="embed" xlink:actuate="onLoad" loext:mime-type="image/png"/></draw:frame></text:p>
            </table:table-cell>
            <table:table-cell table:style-name="Table3.A1" office:value-type="string">
              <text:p text:style-name="MP4"><text:span text:style-name="MT1">Elementary programming</text:span></text:p>
            </table:table-cell>
          </table:table-row>
        </table:table>
        <text:p text:style-name="MP1"/>
      </style:header>
      <loext:header-first>
        <table:table table:name="Table5" table:style-name="Table5">
          <table:table-column table:style-name="Table5.A"/>
          <table:table-column table:style-name="Table5.B"/>
          <table:table-row table:style-name="Table5.1">
            <table:table-cell table:style-name="Table5.A1" office:value-type="string">
              <text:p text:style-name="MP5"/>
            </table:table-cell>
            <table:table-cell table:style-name="Table5.A1" office:value-type="string">
              <text:p text:style-name="MP6">Elementary programming</text:p>
            </table:table-cell>
          </table:table-row>
        </table:table>
        <text:p text:style-name="MP1"/>
      </loext:header-first>
      <style:footer>
        <table:table table:name="Table4" table:style-name="Table4">
          <table:table-column table:style-name="Table4.A"/>
          <table:table-column table:style-name="Table4.B"/>
          <table:table-column table:style-name="Table4.C"/>
          <table:table-row table:style-name="TableLine94720160017856">
            <table:table-cell table:style-name="Table4.A1" office:value-type="string">
              <text:p text:style-name="MP7"><text:span text:style-name="MT2">RED</text:span><text:span text:style-name="MT3">SPICE</text:span><text:span text:style-name="MT4"> </text:span></text:p>
            </table:table-cell>
            <table:table-cell table:style-name="Table4.A1" office:value-type="string">
              <text:p text:style-name="MP8"><text:page-number text:select-page="current">14</text:page-number>/<text:page-count>15</text:page-count></text:p>
            </table:table-cell>
            <table:table-cell table:style-name="Table4.A1" office:value-type="string">
              <text:p text:style-name="MP9">- <text:span text:style-name="MT5">La Caverne Aux Lapins Noirs -</text:span></text:p>
            </table:table-cell>
          </table:table-row>
        </table:table>
        <text:p text:style-name="Footer"/>
      </style:footer>
      <loext:footer-first>
        <table:table table:name="Table1" table:style-name="Table1">
          <table:table-column table:style-name="Table1.A"/>
          <table:table-column table:style-name="Table1.B"/>
          <table:table-row table:style-name="TableLine94720160067264">
            <table:table-cell office:value-type="string">
              <text:p text:style-name="MP10">R<text:span text:style-name="MT1">e</text:span>vision : <text:span text:style-name="MT5">2</text:span>.0</text:p>
            </table:table-cell>
            <table:table-cell office:value-type="string">
              <text:p text:style-name="MP11">Aut<text:span text:style-name="MT1">ho</text:span>r : Jason Brillante</text:p>
            </table:table-cell>
          </table:table-row>
        </table:table>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6T17:54:03.115362682</meta:creation-date>
    <dc:date>2021-11-10T00:49:17.836746238</dc:date>
    <meta:editing-duration>P2DT19H44M15S</meta:editing-duration>
    <meta:editing-cycles>337</meta:editing-cycles>
    <meta:generator>LibreOffice/6.4.7.2$Linux_X86_64 LibreOffice_project/40$Build-2</meta:generator>
    <meta:document-statistic meta:table-count="4" meta:image-count="6" meta:object-count="0" meta:page-count="15" meta:paragraph-count="229" meta:word-count="2192" meta:character-count="12539" meta:non-whitespace-character-count="10141"/>
  </office:meta>
</office:document-meta>
</file>